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5.921cm" fo:margin-left="0cm" fo:margin-top="0cm" fo:margin-bottom="0cm" table:align="left" style:writing-mode="page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7.1cm"/>
    </style:style>
    <style:style style:name="Tableau1.C" style:family="table-column">
      <style:table-column-properties style:column-width="4.41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B1" style:family="table-cell">
      <style:table-cell-properties fo:padding-left="0.191cm" fo:padding-right="0.191cm" fo:padding-top="0cm" fo:padding-bottom="0cm" fo:border-left="none" fo:border-right="none" fo:border-top="none" fo:border-bottom="0.5pt solid #ff8f00"/>
    </style:style>
    <style:style style:name="Tableau2" style:family="table">
      <style:table-properties style:width="15.921cm" fo:margin-left="0.002cm" fo:margin-top="0cm" fo:margin-bottom="0cm" table:align="left" style:writing-mode="page"/>
    </style:style>
    <style:style style:name="Tableau2.A" style:family="table-column">
      <style:table-column-properties style:column-width="15.92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3" style:family="table">
      <style:table-properties style:width="15.921cm" fo:margin-left="0.002cm" fo:margin-top="0cm" fo:margin-bottom="0cm" table:align="left" style:writing-mode="page"/>
    </style:style>
    <style:style style:name="Tableau3.A" style:family="table-column">
      <style:table-column-properties style:column-width="7.96cm"/>
    </style:style>
    <style:style style:name="Tableau3.B" style:family="table-column">
      <style:table-column-properties style:column-width="7.959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1a237e" fo:padding-left="0.265cm" fo:padding-right="0.265cm" fo:padding-top="0.176cm" fo:padding-bottom="0.176cm" fo:border="0.1pt solid #dddddd">
        <style:background-image/>
      </style:table-cell-properties>
    </style:style>
    <style:style style:name="Tableau3.A2" style:family="table-cell">
      <style:table-cell-properties fo:background-color="#e8eaf6" fo:padding-left="0.265cm" fo:padding-right="0.265cm" fo:padding-top="0.141cm" fo:padding-bottom="0.141cm" fo:border="0.1pt solid #dddddd">
        <style:background-image/>
      </style:table-cell-properties>
    </style:style>
    <style:style style:name="Tableau3.A3" style:family="table-cell">
      <style:table-cell-properties fo:background-color="#ffffff" fo:padding-left="0.265cm" fo:padding-right="0.265cm" fo:padding-top="0.141cm" fo:padding-bottom="0.141cm" fo:border="0.1pt solid #dddddd">
        <style:background-image/>
      </style:table-cell-properties>
    </style:style>
    <style:style style:name="Tableau4" style:family="table">
      <style:table-properties style:width="15.921cm" fo:margin-left="0.002cm" fo:margin-top="0cm" fo:margin-bottom="0cm" table:align="left" style:writing-mode="page"/>
    </style:style>
    <style:style style:name="Tableau4.A" style:family="table-column">
      <style:table-column-properties style:column-width="1.409cm"/>
    </style:style>
    <style:style style:name="Tableau4.B" style:family="table-column">
      <style:table-column-properties style:column-width="3.882cm"/>
    </style:style>
    <style:style style:name="Tableau4.C" style:family="table-column">
      <style:table-column-properties style:column-width="10.629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a237e" fo:padding-left="0.265cm" fo:padding-right="0.265cm" fo:padding-top="0.212cm" fo:padding-bottom="0.212cm" fo:border="0.1pt solid #dddddd">
        <style:background-image/>
      </style:table-cell-properties>
    </style:style>
    <style:style style:name="Tableau4.B1" style:family="table-cell">
      <style:table-cell-properties fo:background-color="#e8eaf6" fo:padding-left="0.265cm" fo:padding-right="0.265cm" fo:padding-top="0.212cm" fo:padding-bottom="0.212cm" fo:border="0.1pt solid #dddddd">
        <style:background-image/>
      </style:table-cell-properties>
    </style:style>
    <style:style style:name="Tableau4.C1" style:family="table-cell">
      <style:table-cell-properties fo:background-color="#ffffff" fo:padding-left="0.265cm" fo:padding-right="0.265cm" fo:padding-top="0.212cm" fo:padding-bottom="0.212cm" fo:border="0.1pt solid #dddddd">
        <style:background-image/>
      </style:table-cell-properties>
    </style:style>
    <style:style style:name="Tableau5" style:family="table">
      <style:table-properties style:width="15.921cm" fo:margin-left="0.002cm" fo:margin-top="0cm" fo:margin-bottom="0cm" table:align="left" style:writing-mode="page"/>
    </style:style>
    <style:style style:name="Tableau5.A" style:family="table-column">
      <style:table-column-properties style:column-width="1.409cm"/>
    </style:style>
    <style:style style:name="Tableau5.B" style:family="table-column">
      <style:table-column-properties style:column-width="3.882cm"/>
    </style:style>
    <style:style style:name="Tableau5.C" style:family="table-column">
      <style:table-column-properties style:column-width="10.629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1565c0" fo:padding-left="0.265cm" fo:padding-right="0.265cm" fo:padding-top="0.212cm" fo:padding-bottom="0.212cm" fo:border="0.1pt solid #dddddd">
        <style:background-image/>
      </style:table-cell-properties>
    </style:style>
    <style:style style:name="Tableau5.B1" style:family="table-cell">
      <style:table-cell-properties fo:background-color="#e8eaf6" fo:padding-left="0.265cm" fo:padding-right="0.265cm" fo:padding-top="0.212cm" fo:padding-bottom="0.212cm" fo:border="0.1pt solid #dddddd">
        <style:background-image/>
      </style:table-cell-properties>
    </style:style>
    <style:style style:name="Tableau5.C1" style:family="table-cell">
      <style:table-cell-properties fo:background-color="#ffffff" fo:padding-left="0.265cm" fo:padding-right="0.265cm" fo:padding-top="0.212cm" fo:padding-bottom="0.212cm" fo:border="0.1pt solid #dddddd">
        <style:background-image/>
      </style:table-cell-properties>
    </style:style>
    <style:style style:name="Tableau6" style:family="table">
      <style:table-properties style:width="15.921cm" fo:margin-left="0.002cm" fo:margin-top="0cm" fo:margin-bottom="0cm" table:align="left" style:writing-mode="page"/>
    </style:style>
    <style:style style:name="Tableau6.A" style:family="table-column">
      <style:table-column-properties style:column-width="1.409cm"/>
    </style:style>
    <style:style style:name="Tableau6.B" style:family="table-column">
      <style:table-column-properties style:column-width="3.882cm"/>
    </style:style>
    <style:style style:name="Tableau6.C" style:family="table-column">
      <style:table-column-properties style:column-width="10.629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5100" fo:padding-left="0.265cm" fo:padding-right="0.265cm" fo:padding-top="0.212cm" fo:padding-bottom="0.212cm" fo:border="0.1pt solid #dddddd">
        <style:background-image/>
      </style:table-cell-properties>
    </style:style>
    <style:style style:name="Tableau6.B1" style:family="table-cell">
      <style:table-cell-properties fo:background-color="#e8eaf6" fo:padding-left="0.265cm" fo:padding-right="0.265cm" fo:padding-top="0.212cm" fo:padding-bottom="0.212cm" fo:border="0.1pt solid #dddddd">
        <style:background-image/>
      </style:table-cell-properties>
    </style:style>
    <style:style style:name="Tableau6.C1" style:family="table-cell">
      <style:table-cell-properties fo:background-color="#ffffff" fo:padding-left="0.265cm" fo:padding-right="0.265cm" fo:padding-top="0.212cm" fo:padding-bottom="0.212cm" fo:border="0.1pt solid #dddddd">
        <style:background-image/>
      </style:table-cell-properties>
    </style:style>
    <style:style style:name="Tableau7" style:family="table">
      <style:table-properties style:width="15.921cm" fo:margin-left="0.002cm" fo:margin-top="0cm" fo:margin-bottom="0cm" table:align="left" style:writing-mode="page"/>
    </style:style>
    <style:style style:name="Tableau7.A" style:family="table-column">
      <style:table-column-properties style:column-width="1.409cm"/>
    </style:style>
    <style:style style:name="Tableau7.B" style:family="table-column">
      <style:table-column-properties style:column-width="3.882cm"/>
    </style:style>
    <style:style style:name="Tableau7.C" style:family="table-column">
      <style:table-column-properties style:column-width="10.629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f8f00" fo:padding-left="0.265cm" fo:padding-right="0.265cm" fo:padding-top="0.212cm" fo:padding-bottom="0.212cm" fo:border="0.1pt solid #dddddd">
        <style:background-image/>
      </style:table-cell-properties>
    </style:style>
    <style:style style:name="Tableau7.B1" style:family="table-cell">
      <style:table-cell-properties fo:background-color="#e8eaf6" fo:padding-left="0.265cm" fo:padding-right="0.265cm" fo:padding-top="0.212cm" fo:padding-bottom="0.212cm" fo:border="0.1pt solid #dddddd">
        <style:background-image/>
      </style:table-cell-properties>
    </style:style>
    <style:style style:name="Tableau7.C1" style:family="table-cell">
      <style:table-cell-properties fo:background-color="#ffffff" fo:padding-left="0.265cm" fo:padding-right="0.265cm" fo:padding-top="0.212cm" fo:padding-bottom="0.212cm" fo:border="0.1pt solid #dddddd">
        <style:background-image/>
      </style:table-cell-properties>
    </style:style>
    <style:style style:name="Tableau8" style:family="table">
      <style:table-properties style:width="15.921cm" fo:margin-left="0.002cm" fo:margin-top="0cm" fo:margin-bottom="0cm" table:align="left" style:writing-mode="page"/>
    </style:style>
    <style:style style:name="Tableau8.A" style:family="table-column">
      <style:table-column-properties style:column-width="1.409cm"/>
    </style:style>
    <style:style style:name="Tableau8.B" style:family="table-column">
      <style:table-column-properties style:column-width="3.882cm"/>
    </style:style>
    <style:style style:name="Tableau8.C" style:family="table-column">
      <style:table-column-properties style:column-width="10.62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fafaf8" fo:padding-left="0.265cm" fo:padding-right="0.265cm" fo:padding-top="0.212cm" fo:padding-bottom="0.212cm" fo:border="0.1pt solid #dddddd">
        <style:background-image/>
      </style:table-cell-properties>
    </style:style>
    <style:style style:name="Tableau8.B1" style:family="table-cell">
      <style:table-cell-properties fo:background-color="#e8eaf6" fo:padding-left="0.265cm" fo:padding-right="0.265cm" fo:padding-top="0.212cm" fo:padding-bottom="0.212cm" fo:border="0.1pt solid #dddddd">
        <style:background-image/>
      </style:table-cell-properties>
    </style:style>
    <style:style style:name="Tableau8.C1" style:family="table-cell">
      <style:table-cell-properties fo:background-color="#ffffff" fo:padding-left="0.265cm" fo:padding-right="0.265cm" fo:padding-top="0.212cm" fo:padding-bottom="0.212cm" fo:border="0.1pt solid #dddddd">
        <style:background-image/>
      </style:table-cell-properties>
    </style:style>
    <style:style style:name="Tableau9" style:family="table">
      <style:table-properties style:width="15.921cm" fo:margin-left="0.002cm" fo:margin-top="0cm" fo:margin-bottom="0cm" table:align="left" style:writing-mode="page"/>
    </style:style>
    <style:style style:name="Tableau9.A" style:family="table-column">
      <style:table-column-properties style:column-width="1.409cm"/>
    </style:style>
    <style:style style:name="Tableau9.B" style:family="table-column">
      <style:table-column-properties style:column-width="3.882cm"/>
    </style:style>
    <style:style style:name="Tableau9.C" style:family="table-column">
      <style:table-column-properties style:column-width="10.629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8eaf6" fo:padding-left="0.265cm" fo:padding-right="0.265cm" fo:padding-top="0.212cm" fo:padding-bottom="0.212cm" fo:border="0.1pt solid #dddddd">
        <style:background-image/>
      </style:table-cell-properties>
    </style:style>
    <style:style style:name="Tableau9.C1" style:family="table-cell">
      <style:table-cell-properties fo:background-color="#ffffff" fo:padding-left="0.265cm" fo:padding-right="0.265cm" fo:padding-top="0.212cm" fo:padding-bottom="0.212cm" fo:border="0.1pt solid #dddddd">
        <style:background-image/>
      </style:table-cell-properties>
    </style:style>
    <style:style style:name="Tableau10" style:family="table">
      <style:table-properties style:width="15.921cm" fo:margin-left="0.002cm" fo:margin-top="0cm" fo:margin-bottom="0cm" table:align="left" style:writing-mode="page"/>
    </style:style>
    <style:style style:name="Tableau10.A" style:family="table-column">
      <style:table-column-properties style:column-width="1.409cm"/>
    </style:style>
    <style:style style:name="Tableau10.B" style:family="table-column">
      <style:table-column-properties style:column-width="3.882cm"/>
    </style:style>
    <style:style style:name="Tableau10.C" style:family="table-column">
      <style:table-column-properties style:column-width="10.629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212121" fo:padding-left="0.265cm" fo:padding-right="0.265cm" fo:padding-top="0.212cm" fo:padding-bottom="0.212cm" fo:border="0.1pt solid #dddddd">
        <style:background-image/>
      </style:table-cell-properties>
    </style:style>
    <style:style style:name="Tableau10.B1" style:family="table-cell">
      <style:table-cell-properties fo:background-color="#e8eaf6" fo:padding-left="0.265cm" fo:padding-right="0.265cm" fo:padding-top="0.212cm" fo:padding-bottom="0.212cm" fo:border="0.1pt solid #dddddd">
        <style:background-image/>
      </style:table-cell-properties>
    </style:style>
    <style:style style:name="Tableau10.C1" style:family="table-cell">
      <style:table-cell-properties fo:background-color="#ffffff" fo:padding-left="0.265cm" fo:padding-right="0.265cm" fo:padding-top="0.212cm" fo:padding-bottom="0.212cm" fo:border="0.1pt solid #dddddd">
        <style:background-image/>
      </style:table-cell-properties>
    </style:style>
    <style:style style:name="Tableau11" style:family="table">
      <style:table-properties style:width="15.921cm" fo:margin-left="0.044cm" fo:margin-top="0cm" fo:margin-bottom="0cm" table:align="left" style:writing-mode="page"/>
    </style:style>
    <style:style style:name="Tableau11.A" style:family="table-column">
      <style:table-column-properties style:column-width="15.9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f8e1" fo:padding-left="0.494cm" fo:padding-right="0.494cm" fo:padding-top="0.282cm" fo:padding-bottom="0.282cm" fo:border-left="2.5pt solid #ff8f00" fo:border-right="none" fo:border-top="0.5pt solid #ff8f00" fo:border-bottom="0.5pt solid #ff8f00">
        <style:background-image/>
      </style:table-cell-properties>
    </style:style>
    <style:style style:name="Tableau12" style:family="table">
      <style:table-properties style:width="15.921cm" fo:margin-left="0.002cm" fo:margin-top="0cm" fo:margin-bottom="0cm" table:align="left" style:writing-mode="page"/>
    </style:style>
    <style:style style:name="Tableau12.A" style:family="table-column">
      <style:table-column-properties style:column-width="3.184cm"/>
    </style:style>
    <style:style style:name="Tableau12.E" style:family="table-column">
      <style:table-column-properties style:column-width="3.186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1a237e" fo:padding-left="0.265cm" fo:padding-right="0.265cm" fo:padding-top="0.176cm" fo:padding-bottom="0.176cm" fo:border="0.1pt solid #dddddd">
        <style:background-image/>
      </style:table-cell-properties>
    </style:style>
    <style:style style:name="Tableau12.A2" style:family="table-cell">
      <style:table-cell-properties fo:background-color="#e8eaf6" fo:padding-left="0.265cm" fo:padding-right="0.265cm" fo:padding-top="0.141cm" fo:padding-bottom="0.141cm" fo:border="0.1pt solid #dddddd">
        <style:background-image/>
      </style:table-cell-properties>
    </style:style>
    <style:style style:name="Tableau12.A3" style:family="table-cell">
      <style:table-cell-properties fo:background-color="#ffffff" fo:padding-left="0.265cm" fo:padding-right="0.265cm" fo:padding-top="0.141cm" fo:padding-bottom="0.141cm" fo:border="0.1pt solid #dddddd">
        <style:background-image/>
      </style:table-cell-properties>
    </style:style>
    <style:style style:name="Tableau13" style:family="table">
      <style:table-properties style:width="15.921cm" fo:margin-left="0.044cm" fo:margin-top="0cm" fo:margin-bottom="0cm" table:align="left" style:writing-mode="page"/>
    </style:style>
    <style:style style:name="Tableau13.A" style:family="table-column">
      <style:table-column-properties style:column-width="15.92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8f5e9" fo:padding-left="0.494cm" fo:padding-right="0.494cm" fo:padding-top="0.282cm" fo:padding-bottom="0.282cm" fo:border-left="2.5pt solid #2e7d32" fo:border-right="none" fo:border-top="0.5pt solid #2e7d32" fo:border-bottom="0.5pt solid #2e7d32">
        <style:background-image/>
      </style:table-cell-properties>
    </style:style>
    <style:style style:name="Tableau14" style:family="table">
      <style:table-properties style:width="15.921cm" fo:margin-left="0.002cm" fo:margin-top="0cm" fo:margin-bottom="0cm" table:align="left" style:writing-mode="page"/>
    </style:style>
    <style:style style:name="Tableau14.A" style:family="table-column">
      <style:table-column-properties style:column-width="15.921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15" style:family="table">
      <style:table-properties style:width="15.921cm" fo:margin-left="0.002cm" fo:margin-top="0cm" fo:margin-bottom="0cm" table:align="left" style:writing-mode="page"/>
    </style:style>
    <style:style style:name="Tableau15.A" style:family="table-column">
      <style:table-column-properties style:column-width="15.9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16" style:family="table">
      <style:table-properties style:width="15.921cm" fo:margin-left="0.002cm" fo:margin-top="0cm" fo:margin-bottom="0cm" table:align="left" style:writing-mode="page"/>
    </style:style>
    <style:style style:name="Tableau16.A" style:family="table-column">
      <style:table-column-properties style:column-width="15.921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17" style:family="table">
      <style:table-properties style:width="15.921cm" fo:margin-left="0.002cm" fo:margin-top="0cm" fo:margin-bottom="0cm" table:align="left" style:writing-mode="page"/>
    </style:style>
    <style:style style:name="Tableau17.A" style:family="table-column">
      <style:table-column-properties style:column-width="15.9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18" style:family="table">
      <style:table-properties style:width="15.921cm" fo:margin-left="0.002cm" fo:margin-top="0cm" fo:margin-bottom="0cm" table:align="left" style:writing-mode="page"/>
    </style:style>
    <style:style style:name="Tableau18.A" style:family="table-column">
      <style:table-column-properties style:column-width="15.92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19" style:family="table">
      <style:table-properties style:width="15.921cm" fo:margin-left="0.002cm" fo:margin-top="0cm" fo:margin-bottom="0cm" table:align="left" style:writing-mode="page"/>
    </style:style>
    <style:style style:name="Tableau19.A" style:family="table-column">
      <style:table-column-properties style:column-width="15.92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0" style:family="table">
      <style:table-properties style:width="15.921cm" fo:margin-left="0.002cm" fo:margin-top="0cm" fo:margin-bottom="0cm" table:align="left" style:writing-mode="page"/>
    </style:style>
    <style:style style:name="Tableau20.A" style:family="table-column">
      <style:table-column-properties style:column-width="15.921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1" style:family="table">
      <style:table-properties style:width="15.921cm" fo:margin-left="0.002cm" fo:margin-top="0cm" fo:margin-bottom="0cm" table:align="left" style:writing-mode="page"/>
    </style:style>
    <style:style style:name="Tableau21.A" style:family="table-column">
      <style:table-column-properties style:column-width="15.921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2" style:family="table">
      <style:table-properties style:width="15.921cm" fo:margin-left="0.002cm" fo:margin-top="0cm" fo:margin-bottom="0cm" table:align="left" style:writing-mode="page"/>
    </style:style>
    <style:style style:name="Tableau22.A" style:family="table-column">
      <style:table-column-properties style:column-width="15.921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3" style:family="table">
      <style:table-properties style:width="15.921cm" fo:margin-left="0.002cm" fo:margin-top="0cm" fo:margin-bottom="0cm" table:align="left" style:writing-mode="page"/>
    </style:style>
    <style:style style:name="Tableau23.A" style:family="table-column">
      <style:table-column-properties style:column-width="15.921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4" style:family="table">
      <style:table-properties style:width="15.921cm" fo:margin-left="0.002cm" fo:margin-top="0cm" fo:margin-bottom="0cm" table:align="left" style:writing-mode="page"/>
    </style:style>
    <style:style style:name="Tableau24.A" style:family="table-column">
      <style:table-column-properties style:column-width="15.921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5" style:family="table">
      <style:table-properties style:width="15.921cm" fo:margin-left="0.002cm" fo:margin-top="0cm" fo:margin-bottom="0cm" table:align="left" style:writing-mode="page"/>
    </style:style>
    <style:style style:name="Tableau25.A" style:family="table-column">
      <style:table-column-properties style:column-width="15.921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6" style:family="table">
      <style:table-properties style:width="15.921cm" fo:margin-left="0.002cm" fo:margin-top="0cm" fo:margin-bottom="0cm" table:align="left" style:writing-mode="page"/>
    </style:style>
    <style:style style:name="Tableau26.A" style:family="table-column">
      <style:table-column-properties style:column-width="15.921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e8eaf6" fo:padding-left="0.494cm" fo:padding-right="0.494cm" fo:padding-top="0.282cm" fo:padding-bottom="0.282cm" fo:border="0.1pt solid #dddddd">
        <style:background-image/>
      </style:table-cell-properties>
    </style:style>
    <style:style style:name="Tableau27" style:family="table">
      <style:table-properties style:width="15.921cm" fo:margin-left="0.002cm" fo:margin-top="0cm" fo:margin-bottom="0cm" table:align="left" style:writing-mode="page"/>
    </style:style>
    <style:style style:name="Tableau27.A" style:family="table-column">
      <style:table-column-properties style:column-width="5.306cm"/>
    </style:style>
    <style:style style:name="Tableau27.B" style:family="table-column">
      <style:table-column-properties style:column-width="5.308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1a237e" fo:padding-left="0.265cm" fo:padding-right="0.265cm" fo:padding-top="0.176cm" fo:padding-bottom="0.176cm" fo:border="0.1pt solid #dddddd">
        <style:background-image/>
      </style:table-cell-properties>
    </style:style>
    <style:style style:name="Tableau27.A2" style:family="table-cell">
      <style:table-cell-properties fo:background-color="#e8eaf6" fo:padding-left="0.265cm" fo:padding-right="0.265cm" fo:padding-top="0.141cm" fo:padding-bottom="0.141cm" fo:border="0.1pt solid #dddddd">
        <style:background-image/>
      </style:table-cell-properties>
    </style:style>
    <style:style style:name="Tableau27.A3" style:family="table-cell">
      <style:table-cell-properties fo:background-color="#ffffff" fo:padding-left="0.265cm" fo:padding-right="0.265cm" fo:padding-top="0.141cm" fo:padding-bottom="0.141cm" fo:border="0.1pt solid #dddddd">
        <style:background-image/>
      </style:table-cell-properties>
    </style:style>
    <style:style style:name="Tableau28" style:family="table">
      <style:table-properties style:width="15.921cm" fo:margin-left="0.044cm" fo:margin-top="0cm" fo:margin-bottom="0cm" table:align="left" style:writing-mode="page"/>
    </style:style>
    <style:style style:name="Tableau28.A" style:family="table-column">
      <style:table-column-properties style:column-width="15.921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fff8e1" fo:padding-left="0.494cm" fo:padding-right="0.494cm" fo:padding-top="0.282cm" fo:padding-bottom="0.282cm" fo:border-left="2.5pt solid #ff8f00" fo:border-right="none" fo:border-top="0.5pt solid #ff8f00" fo:border-bottom="0.5pt solid #ff8f00">
        <style:background-image/>
      </style:table-cell-properties>
    </style:style>
    <style:style style:name="Tableau29" style:family="table">
      <style:table-properties style:width="15.921cm" fo:margin-left="0.002cm" fo:margin-top="0cm" fo:margin-bottom="0cm" table:align="left" style:writing-mode="page"/>
    </style:style>
    <style:style style:name="Tableau29.A" style:family="table-column">
      <style:table-column-properties style:column-width="7.96cm"/>
    </style:style>
    <style:style style:name="Tableau29.B" style:family="table-column">
      <style:table-column-properties style:column-width="7.959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1a237e" fo:padding-left="0.265cm" fo:padding-right="0.265cm" fo:padding-top="0.176cm" fo:padding-bottom="0.176cm" fo:border="0.1pt solid #dddddd">
        <style:background-image/>
      </style:table-cell-properties>
    </style:style>
    <style:style style:name="Tableau29.A2" style:family="table-cell">
      <style:table-cell-properties fo:background-color="#e8eaf6" fo:padding-left="0.265cm" fo:padding-right="0.265cm" fo:padding-top="0.141cm" fo:padding-bottom="0.141cm" fo:border="0.1pt solid #dddddd">
        <style:background-image/>
      </style:table-cell-properties>
    </style:style>
    <style:style style:name="Tableau29.A3" style:family="table-cell">
      <style:table-cell-properties fo:background-color="#ffffff" fo:padding-left="0.265cm" fo:padding-right="0.265cm" fo:padding-top="0.141cm" fo:padding-bottom="0.141cm" fo:border="0.1pt solid #dddddd">
        <style:background-image/>
      </style:table-cell-properties>
    </style:style>
    <style:style style:name="Tableau30" style:family="table">
      <style:table-properties style:width="15.921cm" fo:margin-left="0.044cm" fo:margin-top="0cm" fo:margin-bottom="0cm" table:align="left" style:writing-mode="page"/>
    </style:style>
    <style:style style:name="Tableau30.A" style:family="table-column">
      <style:table-column-properties style:column-width="15.921cm"/>
    </style:style>
    <style:style style:name="Tableau30.1" style:family="table-row">
      <style:table-row-properties fo:keep-together="auto"/>
    </style:style>
    <style:style style:name="Tableau30.A1" style:family="table-cell">
      <style:table-cell-properties fo:background-color="#e8f5e9" fo:padding-left="0.494cm" fo:padding-right="0.494cm" fo:padding-top="0.282cm" fo:padding-bottom="0.282cm" fo:border-left="2.5pt solid #2e7d32" fo:border-right="none" fo:border-top="0.5pt solid #2e7d32" fo:border-bottom="0.5pt solid #2e7d32">
        <style:background-image/>
      </style:table-cell-properties>
    </style:style>
    <style:style style:name="P1" style:family="paragraph" style:parent-style-name="Heading_20_1">
      <style:paragraph-properties fo:margin-top="0cm" fo:margin-bottom="0.353cm" style:contextual-spacing="false" fo:break-before="page"/>
    </style:style>
    <style:style style:name="P2" style:family="paragraph" style:parent-style-name="Heading_20_1">
      <style:paragraph-properties fo:margin-top="0cm" fo:margin-bottom="0.353cm" style:contextual-spacing="false"/>
    </style:style>
    <style:style style:name="P3" style:family="paragraph" style:parent-style-name="Heading_20_1">
      <style:paragraph-properties fo:margin-top="0.706cm" fo:margin-bottom="0.353cm" style:contextual-spacing="false"/>
    </style:style>
    <style:style style:name="P4" style:family="paragraph" style:parent-style-name="Heading_20_2">
      <style:paragraph-properties fo:margin-top="0.529cm" fo:margin-bottom="0.265cm" style:contextual-spacing="false"/>
    </style:style>
    <style:style style:name="P5" style:family="paragraph" style:parent-style-name="Heading_20_3">
      <style:paragraph-properties fo:margin-top="0.353cm" fo:margin-bottom="0.176cm" style:contextual-spacing="false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9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.529cm" style:contextual-spacing="false" fo:text-align="center" style:justify-single-word="false"/>
    </style:style>
    <style:style style:name="P11" style:family="paragraph" style:parent-style-name="Standard">
      <style:paragraph-properties fo:text-align="center" style:justify-single-word="false" fo:padding="0cm" fo:border-left="none" fo:border-right="none" fo:border-top="0.11pt solid #dddddd" fo:border-bottom="none"/>
    </style:style>
    <style:style style:name="P12" style:family="paragraph" style:parent-style-name="Standard">
      <style:paragraph-properties fo:margin-top="0cm" fo:margin-bottom="0.141cm" style:contextual-spacing="false"/>
    </style:style>
    <style:style style:name="P13" style:family="paragraph" style:parent-style-name="Standard">
      <style:paragraph-properties fo:margin-top="0cm" fo:margin-bottom="0.176cm" style:contextual-spacing="false"/>
    </style:style>
    <style:style style:name="P14" style:family="paragraph" style:parent-style-name="Standard">
      <style:paragraph-properties fo:margin-top="0cm" fo:margin-bottom="0.282cm" style:contextual-spacing="false" fo:text-align="justify" style:justify-single-word="false"/>
    </style:style>
    <style:style style:name="P15" style:family="paragraph" style:parent-style-name="Standard">
      <style:paragraph-properties fo:margin-left="0.706cm" fo:margin-top="0cm" fo:margin-bottom="0.212cm" style:contextual-spacing="false"/>
    </style:style>
    <style:style style:name="P16" style:family="paragraph" style:parent-style-name="Standard">
      <style:paragraph-properties fo:text-align="end" style:justify-single-word="false" fo:padding="0cm" fo:border-left="none" fo:border-right="none" fo:border-top="none" fo:border-bottom="0.11pt solid #dddddd"/>
    </style:style>
    <style:style style:name="P17" style:family="paragraph" style:parent-style-name="Standard">
      <style:text-properties officeooo:rsid="00071121" officeooo:paragraph-rsid="00071121"/>
    </style:style>
    <style:style style:name="P18" style:family="paragraph" style:parent-style-name="Standard">
      <style:paragraph-properties fo:margin-top="0cm" fo:margin-bottom="0.141cm" style:contextual-spacing="false"/>
      <style:text-properties officeooo:rsid="00071121" officeooo:paragraph-rsid="00071121"/>
    </style:style>
    <style:style style:name="T1" style:family="text">
      <style:text-properties fo:text-transform="uppercase" fo:color="#ff8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" style:family="text">
      <style:text-properties fo:color="#1a237e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1a237e" loext:opacity="100%" style:font-name="Arial" fo:font-size="11pt" style:font-name-asian="Arial2" style:font-size-asian="11pt" style:font-name-complex="Arial2" style:font-size-complex="11pt"/>
    </style:style>
    <style:style style:name="T4" style:family="text">
      <style:text-properties fo:color="#1a237e" loext:opacity="100%" style:font-name="Arial" fo:font-size="11pt" officeooo:rsid="00071121" style:font-name-asian="Arial2" style:font-size-asian="11pt" style:font-name-complex="Arial2" style:font-size-complex="11pt"/>
    </style:style>
    <style:style style:name="T5" style:family="text">
      <style:text-properties fo:color="#1a237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fo:color="#1a237e" loext:opacity="100%" style:font-name="Arial" fo:font-size="17pt" fo:font-weight="bold" style:font-name-asian="Arial2" style:font-size-asian="17pt" style:font-weight-asian="bold" style:font-name-complex="Arial2" style:font-size-complex="17pt" style:font-weight-complex="bold"/>
    </style:style>
    <style:style style:name="T7" style:family="text">
      <style:text-properties fo:color="#1565c0" loext:opacity="100%" style:font-name="Arial" fo:font-size="14pt" fo:font-style="italic" fo:font-weight="bold" style:font-name-asian="Arial2" style:font-size-asian="14pt" style:font-style-asian="italic" style:font-weight-asian="bold" style:font-name-complex="Arial2" style:font-size-complex="14pt" style:font-style-complex="italic" style:font-weight-complex="bold"/>
    </style:style>
    <style:style style:name="T8" style:family="text">
      <style:text-properties fo:color="#1565c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9" style:family="text">
      <style:text-properties fo:color="#616161" loext:opacity="100%" style:font-name="Arial" fo:font-size="11pt" style:font-name-asian="Arial2" style:font-size-asian="11pt" style:font-name-complex="Arial2" style:font-size-complex="11pt"/>
    </style:style>
    <style:style style:name="T10" style:family="text">
      <style:text-properties fo:color="#616161" loext:opacity="100%" style:font-name="Courier New" fo:font-size="11pt" style:font-name-asian="Courier New1" style:font-size-asian="11pt" style:font-name-complex="Courier New1" style:font-size-complex="11pt"/>
    </style:style>
    <style:style style:name="T11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212121" loext:opacity="100%" style:font-name="Arial" fo:font-size="10pt" style:font-name-asian="Arial2" style:font-size-asian="10pt" style:font-name-complex="Arial2" style:font-size-complex="10pt"/>
    </style:style>
    <style:style style:name="T13" style:family="text">
      <style:text-properties fo:color="#212121" loext:opacity="100%" style:font-name="Arial" fo:font-size="10pt" officeooo:rsid="00071121" style:font-name-asian="Arial2" style:font-size-asian="10pt" style:font-name-complex="Arial2" style:font-size-complex="10pt"/>
    </style:style>
    <style:style style:name="T14" style:family="text">
      <style:text-properties fo:color="#212121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5" style:family="text">
      <style:text-properties fo:color="#21212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" style:family="text">
      <style:text-properties fo:color="#212121" loext:opacity="100%" style:font-name="Arial" fo:font-size="11pt" style:font-name-asian="Arial2" style:font-size-asian="11pt" style:font-name-complex="Arial2" style:font-size-complex="11pt"/>
    </style:style>
    <style:style style:name="T17" style:family="text">
      <style:text-properties style:font-name="Arial" fo:font-size="11pt" style:font-name-asian="Arial2" style:font-size-asian="11pt" style:font-name-complex="Arial2" style:font-size-complex="11pt"/>
    </style:style>
    <style:style style:name="T18" style:family="text">
      <style:text-properties fo:color="#e65100" loext:opacity="100%"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T19" style:family="text">
      <style:text-properties fo:color="#e65100" loext:opacity="100%" style:font-name="Arial" fo:font-size="11pt" style:font-name-asian="Arial2" style:font-size-asian="11pt" style:font-name-complex="Arial2" style:font-size-complex="11pt"/>
    </style:style>
    <style:style style:name="T20" style:family="text">
      <style:text-properties fo:color="#2e7d32" loext:opacity="100%"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T21" style:family="text">
      <style:text-properties fo:color="#9e9e9e" loext:opacity="100%" style:font-name="Arial" fo:font-size="9pt" style:font-name-asian="Arial2" style:font-size-asian="9pt" style:font-name-complex="Arial2" style:font-size-complex="9pt"/>
    </style:style>
    <style:style style:name="T22" style:family="text">
      <style:text-properties fo:color="#9e9e9e" loext:opacity="100%" style:font-name="Arial" fo:font-size="9pt" officeooo:rsid="00071121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<text:span text:style-name="T1">BRIEF CRÉATIF</text:span></text:p>
      <text:p text:style-name="P8"><text:span text:style-name="T2">Couverture de l'Ebook</text:span></text:p>
      <text:p text:style-name="P9"><text:span text:style-name="T7">De Zéro à Expert en IA en 90 Jours</text:span></text:p>
      <text:p text:style-name="P10"><text:span text:style-name="T9">Guide complet pour créer la couverture sur Canva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/>
          </table:table-cell>
          <table:table-cell table:style-name="Tableau1.B1" office:value-type="string">
            <text:p text:style-name="P12"/>
          </table:table-cell>
          <table:table-cell table:style-name="Tableau1.A1" office:value-type="string">
            <text:p text:style-name="Standard"/>
          </table:table-cell>
        </table:table-row>
      </table:table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2"><text:span text:style-name="T3">📌 <text:s/>Outil recommandé : Canva (canva.com) — compte gratuit suffisant</text:span></text:p>
            <text:p text:style-name="P12"><text:span text:style-name="T3">📐 <text:s/>Format : A5 personnalisé — 148 x 210 mm (format livre standard)</text:span></text:p>
            <text:p text:style-name="P12"><text:span text:style-name="T3">🎨 <text:s/>Style : Business élégant — fond clair, accents colorés, icônes tech</text:span></text:p>
            <text:p text:style-name="P12"><text:span text:style-name="T3">⏱ <text:s/>Temps estimé : 2 à 3 heures pour un résultat professionnel</text:span></text:p>
          </table:table-cell>
        </table:table-row>
      </table:table>
      <text:p text:style-name="Standard"/>
      <text:h text:style-name="P1" text:outline-level="1"><text:span text:style-name="T6">1. Informations Générales du Livre</text:span></text:h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<text:span text:style-name="T11">Élément</text:span></text:p>
          </table:table-cell>
          <table:table-cell table:style-name="Tableau3.A1" office:value-type="string">
            <text:p text:style-name="Standard"><text:span text:style-name="T11">Contenu exact à utiliser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Titre principal</text:span></text:p>
          </table:table-cell>
          <table:table-cell table:style-name="Tableau3.A2" office:value-type="string">
            <text:p text:style-name="Standard"><text:span text:style-name="T12">De Zéro à Expert en IA en 90 Jours</text:span></text:p>
          </table:table-cell>
        </table:table-row>
        <table:table-row table:style-name="Tableau3.1">
          <table:table-cell table:style-name="Tableau3.A3" office:value-type="string">
            <text:p text:style-name="Standard"><text:span text:style-name="T12">Sous-titre ligne 1</text:span></text:p>
          </table:table-cell>
          <table:table-cell table:style-name="Tableau3.A3" office:value-type="string">
            <text:p text:style-name="Standard"><text:span text:style-name="T12">Le Guide Pratique pour Créer, Vendre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Sous-titre ligne 2</text:span></text:p>
          </table:table-cell>
          <table:table-cell table:style-name="Tableau3.A2" office:value-type="string">
            <text:p text:style-name="Standard"><text:span text:style-name="T12">et Déployer des Agents Intelligents en Afrique</text:span></text:p>
          </table:table-cell>
        </table:table-row>
        <table:table-row table:style-name="Tableau3.1">
          <table:table-cell table:style-name="Tableau3.A3" office:value-type="string">
            <text:p text:style-name="Standard"><text:span text:style-name="T12">Accroche courte</text:span></text:p>
          </table:table-cell>
          <table:table-cell table:style-name="Tableau3.A3" office:value-type="string">
            <text:p text:style-name="Standard"><text:span text:style-name="T12">La méthode d'un </text:span><text:span text:style-name="T13">Auditeur</text:span><text:span text:style-name="T12">-Comptable Béninois qui a tout appris de zéro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Nom auteur</text:span></text:p>
          </table:table-cell>
          <table:table-cell table:style-name="Tableau3.A2" office:value-type="string">
            <text:p text:style-name="P17"><text:span text:style-name="T12">MAFON Ahowanou Odilon</text:span></text:p>
          </table:table-cell>
        </table:table-row>
        <table:table-row table:style-name="Tableau3.1">
          <table:table-cell table:style-name="Tableau3.A3" office:value-type="string">
            <text:p text:style-name="Standard"><text:span text:style-name="T12">Titre auteur</text:span></text:p>
          </table:table-cell>
          <table:table-cell table:style-name="Tableau3.A3" office:value-type="string">
            <text:p text:style-name="Standard"><text:span text:style-name="T12">Expert-Comptable · Formateur en Intelligence Artificielle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Site web</text:span></text:p>
          </table:table-cell>
          <table:table-cell table:style-name="Tableau3.A2" office:value-type="string">
            <text:p text:style-name="P17"><text:span text:style-name="T12">Odilonmafon,com</text:span></text:p>
          </table:table-cell>
        </table:table-row>
        <table:table-row table:style-name="Tableau3.1">
          <table:table-cell table:style-name="Tableau3.A3" office:value-type="string">
            <text:p text:style-name="Standard"><text:span text:style-name="T12">Prix</text:span></text:p>
          </table:table-cell>
          <table:table-cell table:style-name="Tableau3.A3" office:value-type="string">
            <text:p text:style-name="Standard"><text:span text:style-name="T12">15,50 €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Collection</text:span></text:p>
          </table:table-cell>
          <table:table-cell table:style-name="Tableau3.A2" office:value-type="string">
            <text:p text:style-name="Standard"><text:span text:style-name="T12">COLLECTION · INTELLIGENCE ARTIFICIELLE · AFRIQUE</text:span></text:p>
          </table:table-cell>
        </table:table-row>
      </table:table>
      <text:p text:style-name="P6"/>
      <text:h text:style-name="P3" text:outline-level="1"><text:span text:style-name="T6">2. Palette de Couleurs Officielle</text:span></text:h>
      <text:p text:style-name="P13"/>
      <text:p text:style-name="P14"><text:span text:style-name="T14">Ces couleurs sont les couleurs officielles de l'ebook. Utilise-les EXACTEMENT dans Canva en entrant les codes hexadécimaux.</text:span>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Standard"><text:span text:style-name="T17"><text:s text:c="2"/></text:span></text:p>
          </table:table-cell>
          <table:table-cell table:style-name="Tableau4.B1" office:value-type="string">
            <text:p text:style-name="Standard"><text:span text:style-name="T5">Bleu Marine — Couleur principale</text:span></text:p>
          </table:table-cell>
          <table:table-cell table:style-name="Tableau4.C1" office:value-type="string">
            <text:p text:style-name="Standard"><text:span text:style-name="T10">#1A237E</text:span></text:p>
          </table:table-cell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Standard"><text:span text:style-name="T17"><text:s text:c="2"/></text:span></text:p>
          </table:table-cell>
          <table:table-cell table:style-name="Tableau5.B1" office:value-type="string">
            <text:p text:style-name="Standard"><text:span text:style-name="T5">Bleu Moyen — Couleur secondaire</text:span></text:p>
          </table:table-cell>
          <table:table-cell table:style-name="Tableau5.C1" office:value-type="string">
            <text:p text:style-name="Standard"><text:span text:style-name="T10">#1565C0</text:span></text:p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Standard"><text:span text:style-name="T17"><text:s text:c="2"/></text:span></text:p>
          </table:table-cell>
          <table:table-cell table:style-name="Tableau6.B1" office:value-type="string">
            <text:p text:style-name="Standard"><text:span text:style-name="T5">Orange Foncé — Accents et titres forts</text:span></text:p>
          </table:table-cell>
          <table:table-cell table:style-name="Tableau6.C1" office:value-type="string">
            <text:p text:style-name="Standard"><text:span text:style-name="T10">#E65100</text:span></text:p>
          </table:table-cell>
        </table:table-row>
      </table:table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Standard"><text:span text:style-name="T17"><text:s text:c="2"/></text:span></text:p>
          </table:table-cell>
          <table:table-cell table:style-name="Tableau7.B1" office:value-type="string">
            <text:p text:style-name="Standard"><text:span text:style-name="T5">Or/Ambre — Décorations et lignes</text:span></text:p>
          </table:table-cell>
          <table:table-cell table:style-name="Tableau7.C1" office:value-type="string">
            <text:p text:style-name="Standard"><text:span text:style-name="T10">#FF8F00</text:span></text:p>
          </table:table-cell>
        </table:table-row>
      </table:table>
      <text:p text:style-name="P12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office:value-type="string">
            <text:p text:style-name="Standard"><text:span text:style-name="T17"><text:s text:c="2"/></text:span></text:p>
          </table:table-cell>
          <table:table-cell table:style-name="Tableau8.B1" office:value-type="string">
            <text:p text:style-name="Standard"><text:span text:style-name="T5">Blanc Cassé — Fond principal</text:span></text:p>
          </table:table-cell>
          <table:table-cell table:style-name="Tableau8.C1" office:value-type="string">
            <text:p text:style-name="Standard"><text:span text:style-name="T10">#FAFAF8</text:span></text:p>
          </table:table-cell>
        </table:table-row>
      </table:table>
      <text:p text:style-name="P12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Standard"><text:span text:style-name="T17"><text:s text:c="2"/></text:span></text:p>
          </table:table-cell>
          <table:table-cell table:style-name="Tableau9.A1" office:value-type="string">
            <text:p text:style-name="Standard"><text:span text:style-name="T5">Bleu Très Clair — Fonds secondaires</text:span></text:p>
          </table:table-cell>
          <table:table-cell table:style-name="Tableau9.C1" office:value-type="string">
            <text:p text:style-name="Standard"><text:span text:style-name="T10">#E8EAF6</text:span></text:p>
          </table:table-cell>
        </table:table-row>
      </table:table>
      <text:p text:style-name="P1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Standard"><text:span text:style-name="T17"><text:s text:c="2"/></text:span></text:p>
          </table:table-cell>
          <table:table-cell table:style-name="Tableau10.B1" office:value-type="string">
            <text:p text:style-name="Standard"><text:span text:style-name="T5">Noir Doux — Textes courants</text:span></text:p>
          </table:table-cell>
          <table:table-cell table:style-name="Tableau10.C1" office:value-type="string">
            <text:p text:style-name="Standard"><text:span text:style-name="T10">#212121</text:span></text:p>
          </table:table-cell>
        </table:table-row>
      </table:table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Standard"><text:span text:style-name="T18">Règle d'or : Ne jamais utiliser plus de 3 couleurs principales sur la couverture. Bleu marine + Orange + Blanc sont les 3 piliers. Les autres couleurs sont des accents discrets.</text:span></text:p>
          </table:table-cell>
        </table:table-row>
      </table:table>
      <text:p text:style-name="P6"/>
      <text:h text:style-name="P3" text:outline-level="1"><text:span text:style-name="T6">3. Typographie</text:span></text:h>
      <text:p text:style-name="P13"/>
      <table:table table:name="Tableau12" table:style-name="Tableau12">
        <table:table-column table:style-name="Tableau12.A" table:number-columns-repeated="4"/>
        <table:table-column table:style-name="Tableau12.E"/>
        <table:table-row table:style-name="Tableau12.1">
          <table:table-cell table:style-name="Tableau12.A1" office:value-type="string">
            <text:p text:style-name="Standard"><text:span text:style-name="T11">Élément</text:span></text:p>
          </table:table-cell>
          <table:table-cell table:style-name="Tableau12.A1" office:value-type="string">
            <text:p text:style-name="Standard"><text:span text:style-name="T11">Police</text:span></text:p>
          </table:table-cell>
          <table:table-cell table:style-name="Tableau12.A1" office:value-type="string">
            <text:p text:style-name="Standard"><text:span text:style-name="T11">Taille</text:span></text:p>
          </table:table-cell>
          <table:table-cell table:style-name="Tableau12.A1" office:value-type="string">
            <text:p text:style-name="Standard"><text:span text:style-name="T11">Style</text:span></text:p>
          </table:table-cell>
          <table:table-cell table:style-name="Tableau12.A1" office:value-type="string">
            <text:p text:style-name="Standard"><text:span text:style-name="T11">Couleur</text:span></text:p>
          </table:table-cell>
        </table:table-row>
        <table:table-row table:style-name="Tableau12.1">
          <table:table-cell table:style-name="Tableau12.A2" office:value-type="string">
            <text:p text:style-name="Standard"><text:span text:style-name="T12">Titre principal</text:span></text:p>
          </table:table-cell>
          <table:table-cell table:style-name="Tableau12.A2" office:value-type="string">
            <text:p text:style-name="Standard"><text:span text:style-name="T12">Montserrat ou Raleway</text:span></text:p>
          </table:table-cell>
          <table:table-cell table:style-name="Tableau12.A2" office:value-type="string">
            <text:p text:style-name="Standard"><text:span text:style-name="T12">Très grande (72-80pt)</text:span></text:p>
          </table:table-cell>
          <table:table-cell table:style-name="Tableau12.A2" office:value-type="string">
            <text:p text:style-name="Standard"><text:span text:style-name="T12">ExtraBold / Black</text:span></text:p>
          </table:table-cell>
          <table:table-cell table:style-name="Tableau12.A2" office:value-type="string">
            <text:p text:style-name="Standard"><text:span text:style-name="T12">Bleu Marine #1A237E</text:span></text:p>
          </table:table-cell>
        </table:table-row>
        <table:table-row table:style-name="Tableau12.1">
          <table:table-cell table:style-name="Tableau12.A3" office:value-type="string">
            <text:p text:style-name="Standard"><text:span text:style-name="T12">"en 90 Jours"</text:span></text:p>
          </table:table-cell>
          <table:table-cell table:style-name="Tableau12.A3" office:value-type="string">
            <text:p text:style-name="Standard"><text:span text:style-name="T12">Montserrat ou Raleway</text:span></text:p>
          </table:table-cell>
          <table:table-cell table:style-name="Tableau12.A3" office:value-type="string">
            <text:p text:style-name="Standard"><text:span text:style-name="T12">Très grande (72-80pt)</text:span></text:p>
          </table:table-cell>
          <table:table-cell table:style-name="Tableau12.A3" office:value-type="string">
            <text:p text:style-name="Standard"><text:span text:style-name="T12">ExtraBold / Black</text:span></text:p>
          </table:table-cell>
          <table:table-cell table:style-name="Tableau12.A3" office:value-type="string">
            <text:p text:style-name="Standard"><text:span text:style-name="T12">Orange #E65100</text:span></text:p>
          </table:table-cell>
        </table:table-row>
        <table:table-row table:style-name="Tableau12.1">
          <table:table-cell table:style-name="Tableau12.A2" office:value-type="string">
            <text:p text:style-name="Standard"><text:span text:style-name="T12">Sous-titre</text:span></text:p>
          </table:table-cell>
          <table:table-cell table:style-name="Tableau12.A2" office:value-type="string">
            <text:p text:style-name="Standard"><text:span text:style-name="T12">Montserrat</text:span></text:p>
          </table:table-cell>
          <table:table-cell table:style-name="Tableau12.A2" office:value-type="string">
            <text:p text:style-name="Standard"><text:span text:style-name="T12">Moyenne (18-22pt)</text:span></text:p>
          </table:table-cell>
          <table:table-cell table:style-name="Tableau12.A2" office:value-type="string">
            <text:p text:style-name="Standard"><text:span text:style-name="T12">Light Italic</text:span></text:p>
          </table:table-cell>
          <table:table-cell table:style-name="Tableau12.A2" office:value-type="string">
            <text:p text:style-name="Standard"><text:span text:style-name="T12">Bleu #1565C0</text:span></text:p>
          </table:table-cell>
        </table:table-row>
        <table:table-row table:style-name="Tableau12.1">
          <table:table-cell table:style-name="Tableau12.A3" office:value-type="string">
            <text:p text:style-name="Standard"><text:span text:style-name="T12">Accroche</text:span></text:p>
          </table:table-cell>
          <table:table-cell table:style-name="Tableau12.A3" office:value-type="string">
            <text:p text:style-name="Standard"><text:span text:style-name="T12">Open Sans ou Lato</text:span></text:p>
          </table:table-cell>
          <table:table-cell table:style-name="Tableau12.A3" office:value-type="string">
            <text:p text:style-name="Standard"><text:span text:style-name="T12">Petite (12-14pt)</text:span></text:p>
          </table:table-cell>
          <table:table-cell table:style-name="Tableau12.A3" office:value-type="string">
            <text:p text:style-name="Standard"><text:span text:style-name="T12">Regular Italic</text:span></text:p>
          </table:table-cell>
          <table:table-cell table:style-name="Tableau12.A3" office:value-type="string">
            <text:p text:style-name="Standard"><text:span text:style-name="T12">Orange #E65100</text:span></text:p>
          </table:table-cell>
        </table:table-row>
        <table:table-row table:style-name="Tableau12.1">
          <table:table-cell table:style-name="Tableau12.A2" office:value-type="string">
            <text:p text:style-name="Standard"><text:span text:style-name="T12">Nom auteur</text:span></text:p>
          </table:table-cell>
          <table:table-cell table:style-name="Tableau12.A2" office:value-type="string">
            <text:p text:style-name="Standard"><text:span text:style-name="T12">Montserrat</text:span></text:p>
          </table:table-cell>
          <table:table-cell table:style-name="Tableau12.A2" office:value-type="string">
            <text:p text:style-name="Standard"><text:span text:style-name="T12">Grande (24-28pt)</text:span></text:p>
          </table:table-cell>
          <table:table-cell table:style-name="Tableau12.A2" office:value-type="string">
            <text:p text:style-name="Standard"><text:span text:style-name="T12">SemiBold</text:span></text:p>
          </table:table-cell>
          <table:table-cell table:style-name="Tableau12.A2" office:value-type="string">
            <text:p text:style-name="Standard"><text:span text:style-name="T12">Bleu Marine #1A237E</text:span></text:p>
          </table:table-cell>
        </table:table-row>
        <table:table-row table:style-name="Tableau12.1">
          <table:table-cell table:style-name="Tableau12.A3" office:value-type="string">
            <text:p text:style-name="Standard"><text:span text:style-name="T12">Titre auteur</text:span></text:p>
          </table:table-cell>
          <table:table-cell table:style-name="Tableau12.A3" office:value-type="string">
            <text:p text:style-name="Standard"><text:span text:style-name="T12">Open Sans</text:span></text:p>
          </table:table-cell>
          <table:table-cell table:style-name="Tableau12.A3" office:value-type="string">
            <text:p text:style-name="Standard"><text:span text:style-name="T12">Petite (13-14pt)</text:span></text:p>
          </table:table-cell>
          <table:table-cell table:style-name="Tableau12.A3" office:value-type="string">
            <text:p text:style-name="Standard"><text:span text:style-name="T12">Regular</text:span></text:p>
          </table:table-cell>
          <table:table-cell table:style-name="Tableau12.A3" office:value-type="string">
            <text:p text:style-name="Standard"><text:span text:style-name="T12">Gris #616161</text:span></text:p>
          </table:table-cell>
        </table:table-row>
        <table:table-row table:style-name="Tableau12.1">
          <table:table-cell table:style-name="Tableau12.A2" office:value-type="string">
            <text:p text:style-name="Standard"><text:span text:style-name="T12">Collection</text:span></text:p>
          </table:table-cell>
          <table:table-cell table:style-name="Tableau12.A2" office:value-type="string">
            <text:p text:style-name="Standard"><text:span text:style-name="T12">Montserrat</text:span></text:p>
          </table:table-cell>
          <table:table-cell table:style-name="Tableau12.A2" office:value-type="string">
            <text:p text:style-name="Standard"><text:span text:style-name="T12">Très petite (10-11pt)</text:span></text:p>
          </table:table-cell>
          <table:table-cell table:style-name="Tableau12.A2" office:value-type="string">
            <text:p text:style-name="Standard"><text:span text:style-name="T12">Medium — espacement large</text:span></text:p>
          </table:table-cell>
          <table:table-cell table:style-name="Tableau12.A2" office:value-type="string">
            <text:p text:style-name="Standard"><text:span text:style-name="T12">Bleu Marine #1A237E</text:span></text:p>
          </table:table-cell>
        </table:table-row>
      </table:table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Standard"><text:span text:style-name="T20">Dans Canva, ces polices sont disponibles gratuitement. Cherche 'Montserrat' dans la barre de polices. Pour l'espacement des lettres du texte COLLECTION, utilise l'option 'Espacement' et monte à 3 ou 4.</text:span></text:p>
          </table:table-cell>
        </table:table-row>
      </table:table>
      <text:p text:style-name="P6"/>
      <text:p text:style-name="Standard"/>
      <text:h text:style-name="P1" text:outline-level="1"><text:span text:style-name="T6">4. Structure et Disposition — Zone par Zone</text:span></text:h>
      <text:p text:style-name="P13"/>
      <text:p text:style-name="P14"><text:span text:style-name="T14">La couverture est divisée en 6 zones. Voici ce que chaque zone doit contenir et comment la créer dans Canva.</text:span></text:p>
      <text:p text:style-name="P6"/>
      <text:h text:style-name="P4" text:outline-level="2"><text:span text:style-name="T8">Zone 1 — Bande Supérieure (0 à 12mm du haut)</text:span></text:h>
      <text:p text:style-name="P13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2"><text:span text:style-name="T3">🎨 <text:s/>Fond : Bleu Marine #1A237E — rectangle plein sur toute la largeur</text:span></text:p>
            <text:p text:style-name="P12"><text:span text:style-name="T3">📏 <text:s/>Hauteur : 8mm pour la bande bleue + 4mm pour une bande or (#FF8F00)</text:span></text:p>
            <text:p text:style-name="P12"><text:span text:style-name="T3">📝 <text:s/>Texte : 'COLLECTION · INTELLIGENCE ARTIFICIELLE · AFRIQUE'</text:span></text:p>
            <text:p text:style-name="P12"><text:span text:style-name="T3">✍️ <text:s/>Style : Montserrat 10pt, Medium, blanc, espacement large, centré</text:span></text:p>
          </table:table-cell>
        </table:table-row>
      </table:table>
      <text:p text:style-name="P13"/>
      <text:p text:style-name="P14"><text:span text:style-name="T14">Comment faire dans Canva : Insère un rectangle → fond bleu marine → toute la largeur → hauteur 8mm. Insère un 2ème rectangle or dessous hauteur 4mm.</text:span></text:p>
      <text:p text:style-name="P6"/>
      <text:h text:style-name="P4" text:outline-level="2"><text:span text:style-name="T8">Zone 2 — Visuel Principal (12mm à 180mm du haut)</text:span></text:h>
      <text:p text:style-name="P13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2"><text:span text:style-name="T3">🎨 <text:s/>Fond : Blanc cassé #FAFAF8 (fond général de la page)</text:span></text:p>
            <text:p text:style-name="P12"><text:span text:style-name="T3">🖼️ <text:s/>Élément central : Illustration cerveau + circuit IA — voir options ci-dessous</text:span></text:p>
            <text:p text:style-name="P12"><text:span text:style-name="T3">📐 <text:s/>Taille de l'illustration : 80 à 100mm de large, centrée horizontalement</text:span></text:p>
            <text:p text:style-name="P12"><text:span text:style-name="T3">📍 <text:s/>Position : centrée entre x=24mm et x=124mm, y=20mm à y=120mm</text:span></text:p>
          </table:table-cell>
        </table:table-row>
      </table:table>
      <text:p text:style-name="P13"/>
      <text:h text:style-name="P5" text:outline-level="3"><text:span text:style-name="T15">Options pour l'illustration centrale (choisir une)</text:span></text:h>
      <text:p text:style-name="P13"/>
      <text:p text:style-name="P15"><text:span text:style-name="T19">A) <text:s/></text:span><text:span text:style-name="T16">Option A — Banque d'images Canva : Cherche 'AI brain technology' ou 'artificial intelligence circuit' dans les éléments Canva. Filtre : gratuit. Choisir un visuel propre sur fond transparent.</text:span></text:p>
      <text:p text:style-name="P12"/>
      <text:p text:style-name="P15"><text:span text:style-name="T19">B) <text:s/></text:span><text:span text:style-name="T16">Option B — Freepik.com : Va sur freepik.com et cherche 'artificial intelligence brain vector free'. Télécharge en PNG fond transparent. Importe dans Canva.</text:span></text:p>
      <text:p text:style-name="P12"/>
      <text:p text:style-name="P15"><text:span text:style-name="T19">C) <text:s/></text:span><text:span text:style-name="T16">Option C — Flaticon.com : Cherche 'artificial intelligence' ou 'neural network'. Télécharge le PNG. Importe dans Canva. Colorie en bleu marine.</text:span></text:p>
      <text:p text:style-name="P12"/>
      <text:p text:style-name="P15"><text:span text:style-name="T19">D) <text:s/></text:span><text:span text:style-name="T16">Option D — Éléments géométriques Canva : Crée un cerveau stylisé avec des formes Canva — cercles, lignes et points en bleu marine et orange.</text:span></text:p>
      <text:p text:style-name="P6"/>
      <text:h text:style-name="P4" text:outline-level="2"><text:soft-page-break/><text:span text:style-name="T8">Zone 3 — Titre Principal (180mm à 260mm du haut)</text:span></text:h>
      <text:p text:style-name="P13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2"><text:span text:style-name="T3">📝 <text:s/>Ligne 1 : 'De Zéro à Expert en IA' — Montserrat ExtraBold, 48-52pt, Bleu Marine</text:span></text:p>
            <text:p text:style-name="P12"><text:span text:style-name="T3">📝 <text:s/>Ligne 2 : 'en 90 Jours' — Montserrat ExtraBold, 48-52pt, Orange #E65100</text:span></text:p>
            <text:p text:style-name="P12"><text:span text:style-name="T3">📐 <text:s/>Alignement : Aligné à gauche, marge gauche de 8mm</text:span></text:p>
            <text:p text:style-name="P12"><text:span text:style-name="T3">🎨 <text:s/>Ligne décorative : Trait orange #FF8F00, 2pt, avant le titre (à gauche, 40mm de large)</text:span></text:p>
          </table:table-cell>
        </table:table-row>
      </table:table>
      <text:p text:style-name="P13"/>
      <text:p text:style-name="P14"><text:span text:style-name="T14">Comment faire dans Canva : Insère 2 zones de texte séparées. Première zone en bleu marine, deuxième en orange. Aligne-les à gauche. Insère une ligne horizontale orange 2pt avant les textes.</text:span></text:p>
      <text:p text:style-name="P6"/>
      <text:h text:style-name="P4" text:outline-level="2"><text:span text:style-name="T8">Zone 4 — Sous-titre (260mm à 295mm du haut)</text:span></text:h>
      <text:p text:style-name="P13"/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12"><text:span text:style-name="T3">📝 <text:s/>Texte : 'Le Guide Pratique pour Créer, Vendre'</text:span></text:p>
            <text:p text:style-name="P12"><text:span text:style-name="T3">📝 <text:s/>Texte : 'et Déployer des Agents Intelligents en Afrique'</text:span></text:p>
            <text:p text:style-name="P12"><text:span text:style-name="T3">✍️ <text:s/>Style : Montserrat Light Italic, 16-18pt, Bleu #1565C0</text:span></text:p>
            <text:p text:style-name="P12"><text:span text:style-name="T3">📐 <text:s/>Alignement : Aligné à gauche, même marge que le titre</text:span></text:p>
          </table:table-cell>
        </table:table-row>
      </table:table>
      <text:p text:style-name="P6"/>
      <text:h text:style-name="P4" text:outline-level="2"><text:span text:style-name="T8">Zone 5 — Encadré Accroche (295mm à 325mm du haut)</text:span></text:h>
      <text:p text:style-name="P13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2"><text:span text:style-name="T3">🎨 <text:s/>Fond : Rectangle #FFF8E1 (jaune très clair), coins arrondis 4px</text:span></text:p>
            <text:p text:style-name="P12"><text:span text:style-name="T3">🎨 <text:s/>Bordure gauche : Trait vertical orange #FF8F00, 4pt d'épaisseur</text:span></text:p>
            <text:p text:style-name="P12"><text:span text:style-name="T3">📝 <text:s/>Texte ligne 1 : 'La méthode d'un Expert-Comptable Béninois qui a tout appris de zéro'</text:span></text:p>
            <text:p text:style-name="P12"><text:span text:style-name="T3">📝 <text:s/>Texte ligne 2 : 'pour automatiser, innover et dominer son marché avec l'IA'</text:span></text:p>
            <text:p text:style-name="P12"><text:span text:style-name="T3">✍️ <text:s/>Style : Open Sans Italic, 11-12pt, Orange foncé #E65100</text:span></text:p>
            <text:p text:style-name="P12"><text:span text:style-name="T3">📐 <text:s/>Largeur : Toute la largeur utile (8mm à 140mm)</text:span></text:p>
          </table:table-cell>
        </table:table-row>
      </table:table>
      <text:p text:style-name="P6"/>
      <text:h text:style-name="P4" text:outline-level="2"><text:span text:style-name="T8">Zone 6 — Bande Auteur (325mm à 370mm du haut — bas de page)</text:span></text:h>
      <text:p text:style-name="P13"/>
      <table:table table:name="Tableau19" table:style-name="Tableau19">
        <table:table-column table:style-name="Tableau19.A"/>
        <table:table-row table:style-name="Tableau19.1">
          <table:table-cell table:style-name="Tableau19.A1" office:value-type="string">
            <text:p text:style-name="P12"><text:span text:style-name="T3">🎨 <text:s/>Ligne séparatrice : Trait bleu marine 1.5pt + trait or 0.5pt juste en dessous</text:span></text:p>
            <text:p text:style-name="P12"><text:span text:style-name="T3">👤 <text:s/>Avatar : Cercle 18mm de diamètre, fond #E8EAF6, initiales 'AJM' en bleu marine</text:span></text:p>
            <text:p text:style-name="P12"><text:span text:style-name="T3">📝 <text:s/>Nom : 'AIZO Jean Marie' — Montserrat SemiBold 20pt, Bleu Marine</text:span></text:p>
            <text:p text:style-name="P12"><text:span text:style-name="T3">📝 <text:s/>Titre : 'Expert-Comptable · Formateur IA · aizojean.com' — Open Sans 12pt, Gris</text:span></text:p>
            <text:p text:style-name="P12"><text:soft-page-break/><text:span text:style-name="T3">💰 <text:s/>Badge prix : Rectangle bleu marine, texte 'PRIX' en or + '15,50€' en blanc bold</text:span></text:p>
            <text:p text:style-name="P12"><text:span text:style-name="T3">📍 <text:s/>Badge prix positionné : Coin bas droit de la couverture</text:span></text:p>
          </table:table-cell>
        </table:table-row>
      </table:table>
      <text:p text:style-name="P6"/>
      <text:h text:style-name="P4" text:outline-level="2"><text:span text:style-name="T8">Zone Bande Inférieure</text:span></text:h>
      <text:p text:style-name="P13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2"><text:span text:style-name="T3">🎨 <text:s/>Fond : Rectangle Bleu Marine #1A237E sur toute la largeur</text:span></text:p>
            <text:p text:style-name="P12"><text:span text:style-name="T3">📏 <text:s/>Hauteur : 12mm</text:span></text:p>
            <text:p text:style-name="P12"><text:span text:style-name="T3">📍 <text:s/>Position : Tout en bas de la couverture</text:span></text:p>
          </table:table-cell>
        </table:table-row>
      </table:table>
      <text:p text:style-name="P6"/>
      <text:p text:style-name="Standard"/>
      <text:h text:style-name="P1" text:outline-level="1"><text:span text:style-name="T6">5. Guide Canva — Étapes de Création</text:span></text:h>
      <text:p text:style-name="P13"/>
      <text:h text:style-name="P4" text:outline-level="2"><text:span text:style-name="T8">Étape 1 — Créer le document</text:span></text:h>
      <text:p text:style-name="P13"/>
      <text:p text:style-name="P15"><text:span text:style-name="T19">› <text:s/></text:span><text:span text:style-name="T16">Va sur canva.com et connecte-toi</text:span></text:p>
      <text:p text:style-name="P15"><text:span text:style-name="T19">› <text:s/></text:span><text:span text:style-name="T16">Clique sur 'Créer un design' → 'Taille personnalisée'</text:span></text:p>
      <text:p text:style-name="P15"><text:span text:style-name="T19">› <text:s/></text:span><text:span text:style-name="T16">Entre : Largeur 148mm · Hauteur 210mm</text:span></text:p>
      <text:p text:style-name="P15"><text:span text:style-name="T19">› <text:s/></text:span><text:span text:style-name="T16">Clique sur 'Créer un nouveau design'</text:span></text:p>
      <text:p text:style-name="P6"/>
      <text:h text:style-name="P4" text:outline-level="2"><text:span text:style-name="T8">Étape 2 — Configurer le fond</text:span></text:h>
      <text:p text:style-name="P13"/>
      <text:p text:style-name="P15"><text:span text:style-name="T19">› <text:s/></text:span><text:span text:style-name="T16">Clique sur le fond de la page</text:span></text:p>
      <text:p text:style-name="P15"><text:span text:style-name="T19">› <text:s/></text:span><text:span text:style-name="T16">Dans 'Couleur du fond', entre #FAFAF8</text:span></text:p>
      <text:p text:style-name="P15"><text:span text:style-name="T19">› <text:s/></text:span><text:span text:style-name="T16">Valide avec Entrée</text:span></text:p>
      <text:p text:style-name="P6"/>
      <text:h text:style-name="P4" text:outline-level="2"><text:span text:style-name="T8">Étape 3 — Ajouter les bandes colorées</text:span></text:h>
      <text:p text:style-name="P13"/>
      <text:p text:style-name="P15"><text:span text:style-name="T19">› <text:s/></text:span><text:span text:style-name="T16">Clique sur 'Éléments' → 'Formes' → Carré/Rectangle</text:span></text:p>
      <text:p text:style-name="P15"><text:span text:style-name="T19">› <text:s/></text:span><text:span text:style-name="T16">Dessine un rectangle en haut sur toute la largeur, hauteur 8mm</text:span></text:p>
      <text:p text:style-name="P15"><text:span text:style-name="T19">› <text:s/></text:span><text:span text:style-name="T16">Couleur : #1A237E (Bleu Marine)</text:span></text:p>
      <text:p text:style-name="P15"><text:span text:style-name="T19">› <text:s/></text:span><text:span text:style-name="T16">Duplique le rectangle → hauteur 4mm → place juste dessous → couleur #FF8F00</text:span></text:p>
      <text:p text:style-name="P15"><text:span text:style-name="T19">› <text:s/></text:span><text:span text:style-name="T16">Répète pour la bande du bas (12mm, Bleu Marine)</text:span></text:p>
      <text:p text:style-name="P6"/>
      <text:h text:style-name="P4" text:outline-level="2"><text:span text:style-name="T8">Étape 4 — Ajouter l'illustration IA</text:span></text:h>
      <text:p text:style-name="P13"/>
      <text:p text:style-name="P15"><text:span text:style-name="T19">› <text:s/></text:span><text:span text:style-name="T16">Clique sur 'Éléments' → barre de recherche → tape 'artificial intelligence brain'</text:span></text:p>
      <text:p text:style-name="P15"><text:span text:style-name="T19">› <text:s/></text:span><text:span text:style-name="T16">Filtre sur 'Gratuit' → choisis une illustration propre sur fond transparent</text:span></text:p>
      <text:p text:style-name="P15"><text:span text:style-name="T19">› <text:s/></text:span><text:span text:style-name="T16">Redimensionne à 80-90mm de large</text:span></text:p>
      <text:p text:style-name="P15"><text:span text:style-name="T19">› <text:s/></text:span><text:span text:style-name="T16">Centre horizontalement → positionne entre y=15mm et y=110mm</text:span></text:p>
      <text:p text:style-name="P15"><text:span text:style-name="T19">› <text:s/></text:span><text:span text:style-name="T16">Si besoin, change la couleur avec l'outil de couleur Canva → Bleu Marine</text:span></text:p>
      <text:p text:style-name="P6"/>
      <text:h text:style-name="P4" text:outline-level="2"><text:span text:style-name="T8">Étape 5 — Ajouter le titre</text:span></text:h>
      <text:p text:style-name="P13"/>
      <text:p text:style-name="P15"><text:soft-page-break/><text:span text:style-name="T19">› <text:s/></text:span><text:span text:style-name="T16">Clique sur 'Texte' → 'Ajouter un titre'</text:span></text:p>
      <text:p text:style-name="P15"><text:span text:style-name="T19">› <text:s/></text:span><text:span text:style-name="T16">Tape : De Zéro à Expert en IA</text:span></text:p>
      <text:p text:style-name="P15"><text:span text:style-name="T19">› <text:s/></text:span><text:span text:style-name="T16">Police : Montserrat → ExtraBold → Taille 48-50pt → Couleur #1A237E</text:span></text:p>
      <text:p text:style-name="P15"><text:span text:style-name="T19">› <text:s/></text:span><text:span text:style-name="T16">Duplique → Tape : en 90 Jours → Couleur #E65100</text:span></text:p>
      <text:p text:style-name="P15"><text:span text:style-name="T19">› <text:s/></text:span><text:span text:style-name="T16">Aligne les deux textes à gauche, marge 8mm</text:span></text:p>
      <text:p text:style-name="P15"><text:span text:style-name="T19">› <text:s/></text:span><text:span text:style-name="T16">Insère une ligne horizontale orange (2pt) au-dessus du titre</text:span></text:p>
      <text:p text:style-name="P6"/>
      <text:h text:style-name="P4" text:outline-level="2"><text:span text:style-name="T8">Étape 6 — Ajouter sous-titre et accroche</text:span></text:h>
      <text:p text:style-name="P13"/>
      <text:p text:style-name="P15"><text:span text:style-name="T19">› <text:s/></text:span><text:span text:style-name="T16">Insère une zone texte → Montserrat Light Italic 16pt → Bleu #1565C0</text:span></text:p>
      <text:p text:style-name="P15"><text:span text:style-name="T19">› <text:s/></text:span><text:span text:style-name="T16">Tape les deux lignes du sous-titre</text:span></text:p>
      <text:p text:style-name="P15"><text:span text:style-name="T19">› <text:s/></text:span><text:span text:style-name="T16">Insère un rectangle #FFF8E1 (accroche) → coins arrondis → largeur totale</text:span></text:p>
      <text:p text:style-name="P15"><text:span text:style-name="T19">› <text:s/></text:span><text:span text:style-name="T16">Ajoute un rectangle vertical orange 4pt à gauche de l'encadré</text:span></text:p>
      <text:p text:style-name="P15"><text:span text:style-name="T19">› <text:s/></text:span><text:span text:style-name="T16">Insère le texte de l'accroche en italique orange</text:span></text:p>
      <text:p text:style-name="P6"/>
      <text:h text:style-name="P4" text:outline-level="2"><text:span text:style-name="T8">Étape 7 — Ajouter la section auteur</text:span></text:h>
      <text:p text:style-name="P13"/>
      <text:p text:style-name="P15"><text:span text:style-name="T19">› <text:s/></text:span><text:span text:style-name="T16">Insère une ligne horizontale Bleu Marine 1.5pt → toute la largeur</text:span></text:p>
      <text:p text:style-name="P15"><text:span text:style-name="T19">› <text:s/></text:span><text:span text:style-name="T16">Insère un cercle 18mm → fond #E8EAF6 → texte 'AJM' Montserrat Bold 14pt Bleu Marine</text:span></text:p>
      <text:p text:style-name="P15"><text:span text:style-name="T19">› <text:s/></text:span><text:span text:style-name="T16">Insère le nom 'AIZO Jean Marie' → Montserrat SemiBold 20pt → Bleu Marine</text:span></text:p>
      <text:p text:style-name="P15"><text:span text:style-name="T19">› <text:s/></text:span><text:span text:style-name="T16">Insère le titre en dessous → Open Sans 12pt → Gris #616161</text:span></text:p>
      <text:p text:style-name="P15"><text:span text:style-name="T19">› <text:s/></text:span><text:span text:style-name="T16">Crée le badge prix : Rectangle Bleu Marine → texte 'PRIX' or + '15,50€' blanc</text:span></text:p>
      <text:p text:style-name="P6"/>
      <text:h text:style-name="P4" text:outline-level="2"><text:span text:style-name="T8">Étape 8 — Finalisation et export</text:span></text:h>
      <text:p text:style-name="P13"/>
      <text:p text:style-name="P15"><text:span text:style-name="T19">› <text:s/></text:span><text:span text:style-name="T16">Vérifie que tous les textes sont bien lisibles</text:span></text:p>
      <text:p text:style-name="P15"><text:span text:style-name="T19">› <text:s/></text:span><text:span text:style-name="T16">Vérifie que les couleurs correspondent aux codes hexadécimaux</text:span></text:p>
      <text:p text:style-name="P15"><text:span text:style-name="T19">› <text:s/></text:span><text:span text:style-name="T16">Clique sur 'Partager' → 'Télécharger'</text:span></text:p>
      <text:p text:style-name="P15"><text:span text:style-name="T19">› <text:s/></text:span><text:span text:style-name="T16">Format : PNG → Résolution 300 DPI (haute qualité)</text:span></text:p>
      <text:p text:style-name="P15"><text:span text:style-name="T19">› <text:s/></text:span><text:span text:style-name="T16">Télécharge et utilise pour ton ebook</text:span></text:p>
      <text:p text:style-name="P6"/>
      <text:p text:style-name="Standard"/>
      <text:h text:style-name="P1" text:outline-level="1"><text:span text:style-name="T6">6. Textes Exacts à Copier-Coller</text:span></text:h>
      <text:p text:style-name="P13"/>
      <text:p text:style-name="P14"><text:span text:style-name="T14">Copie ces textes EXACTEMENT dans Canva pour éviter les fautes de frappe.</text:span></text:p>
      <text:h text:style-name="P4" text:outline-level="2"><text:span text:style-name="T8">Bande collection</text:span></text:h>
      <text:p text:style-name="P13"/>
      <table:table table:name="Tableau21" table:style-name="Tableau21">
        <table:table-column table:style-name="Tableau21.A"/>
        <table:table-row table:style-name="Tableau21.1">
          <table:table-cell table:style-name="Tableau21.A1" office:value-type="string">
            <text:p text:style-name="P12"><text:span text:style-name="T3">COLLECTION <text:s/>· <text:s/>INTELLIGENCE ARTIFICIELLE <text:s/>· <text:s/>AFRIQUE</text:span></text:p>
          </table:table-cell>
        </table:table-row>
      </table:table>
      <text:h text:style-name="P4" text:outline-level="2"><text:span text:style-name="T8">Titre principal</text:span></text:h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2"><text:span text:style-name="T3">De Zéro à Expert en IA</text:span></text:p>
            <text:p text:style-name="P12"><text:span text:style-name="T3">(en bleu marine)</text:span></text:p>
            <text:p text:style-name="P12"/>
            <text:p text:style-name="P12"><text:span text:style-name="T3">en 90 Jours</text:span></text:p>
            <text:p text:style-name="P12"><text:span text:style-name="T3">(en orange)</text:span></text:p>
          </table:table-cell>
        </table:table-row>
      </table:table>
      <text:h text:style-name="P4" text:outline-level="2"><text:span text:style-name="T8">Sous-titre</text:span></text:h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12"><text:span text:style-name="T3">Le Guide Pratique pour Créer, Vendre</text:span></text:p>
            <text:p text:style-name="P12"><text:span text:style-name="T3">et Déployer des Agents Intelligents en Afrique</text:span></text:p>
          </table:table-cell>
        </table:table-row>
      </table:table>
      <text:h text:style-name="P4" text:outline-level="2"><text:span text:style-name="T8">Accroche encadrée</text:span></text:h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2"><text:span text:style-name="T3">La méthode d'un Expert-Comptable Béninois qui a tout appris de zéro</text:span></text:p>
            <text:p text:style-name="P12"><text:span text:style-name="T3">pour automatiser, innover et dominer son marché avec l'intelligence artificielle</text:span></text:p>
          </table:table-cell>
        </table:table-row>
      </table:table>
      <text:h text:style-name="P4" text:outline-level="2"><text:span text:style-name="T8">Section auteur</text:span></text:h>
      <table:table table:name="Tableau25" table:style-name="Tableau25">
        <table:table-column table:style-name="Tableau25.A"/>
        <table:table-row table:style-name="Tableau25.1">
          <table:table-cell table:style-name="Tableau25.A1" office:value-type="string">
            <text:p text:style-name="P18"><text:span text:style-name="T3">MAFON Ahowanou Odilon</text:span></text:p>
            <text:p text:style-name="P12"><text:span text:style-name="T4">Consultant en Audit et Comptabilité</text:span><text:span text:style-name="T3"> · <text:s/>Formateur en Intelligence Artificielle</text:span></text:p>
            <text:p text:style-name="P18"><text:span text:style-name="T3">odillonmafon.com</text:span></text:p>
          </table:table-cell>
        </table:table-row>
      </table:table>
      <text:p text:style-name="P6"/>
      <text:h text:style-name="P4" text:outline-level="2"><text:span text:style-name="T8">Badge prix</text:span></text:h>
      <text:p text:style-name="P13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2"><text:span text:style-name="T3">PRIX</text:span></text:p>
            <text:p text:style-name="P12"><text:span text:style-name="T3">15,50 €</text:span></text:p>
          </table:table-cell>
        </table:table-row>
      </table:table>
      <text:p text:style-name="P6"/>
      <text:h text:style-name="P2" text:outline-level="1"><text:soft-page-break/><text:span text:style-name="T6">7. Ressources pour les Images</text:span></text:h>
      <text:p text:style-name="P13"/>
      <text:p text:style-name="P14"><text:span text:style-name="T14">Voici les meilleurs sites pour trouver des illustrations IA gratuites et professionnelles.</text:span></text:p>
      <text:p text:style-name="P6"/>
      <text:h text:style-name="P4" text:outline-level="2"><text:span text:style-name="T8">Sites gratuits recommandés</text:span></text:h>
      <text:p text:style-name="P13"/>
      <table:table table:name="Tableau27" table:style-name="Tableau27">
        <table:table-column table:style-name="Tableau27.A"/>
        <table:table-column table:style-name="Tableau27.B" table:number-columns-repeated="2"/>
        <table:table-row table:style-name="Tableau27.1">
          <table:table-cell table:style-name="Tableau27.A1" office:value-type="string">
            <text:p text:style-name="Standard"><text:span text:style-name="T11">Site</text:span></text:p>
          </table:table-cell>
          <table:table-cell table:style-name="Tableau27.A1" office:value-type="string">
            <text:p text:style-name="Standard"><text:span text:style-name="T11">Lien</text:span></text:p>
          </table:table-cell>
          <table:table-cell table:style-name="Tableau27.A1" office:value-type="string">
            <text:p text:style-name="Standard"><text:span text:style-name="T11">Quoi chercher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Freepik</text:span></text:p>
          </table:table-cell>
          <table:table-cell table:style-name="Tableau27.A2" office:value-type="string">
            <text:p text:style-name="Standard"><text:span text:style-name="T12">freepik.com</text:span></text:p>
          </table:table-cell>
          <table:table-cell table:style-name="Tableau27.A2" office:value-type="string">
            <text:p text:style-name="Standard"><text:span text:style-name="T12">artificial intelligence brain vector</text:span></text:p>
          </table:table-cell>
        </table:table-row>
        <table:table-row table:style-name="Tableau27.1">
          <table:table-cell table:style-name="Tableau27.A3" office:value-type="string">
            <text:p text:style-name="Standard"><text:span text:style-name="T12">Flaticon</text:span></text:p>
          </table:table-cell>
          <table:table-cell table:style-name="Tableau27.A3" office:value-type="string">
            <text:p text:style-name="Standard"><text:span text:style-name="T12">flaticon.com</text:span></text:p>
          </table:table-cell>
          <table:table-cell table:style-name="Tableau27.A3" office:value-type="string">
            <text:p text:style-name="Standard"><text:span text:style-name="T12">neural network, AI chip, robot head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Undraw</text:span></text:p>
          </table:table-cell>
          <table:table-cell table:style-name="Tableau27.A2" office:value-type="string">
            <text:p text:style-name="Standard"><text:span text:style-name="T12">undraw.co</text:span></text:p>
          </table:table-cell>
          <table:table-cell table:style-name="Tableau27.A2" office:value-type="string">
            <text:p text:style-name="Standard"><text:span text:style-name="T12">artificial intelligence, data science</text:span></text:p>
          </table:table-cell>
        </table:table-row>
        <table:table-row table:style-name="Tableau27.1">
          <table:table-cell table:style-name="Tableau27.A3" office:value-type="string">
            <text:p text:style-name="Standard"><text:span text:style-name="T12">Storyset</text:span></text:p>
          </table:table-cell>
          <table:table-cell table:style-name="Tableau27.A3" office:value-type="string">
            <text:p text:style-name="Standard"><text:span text:style-name="T12">storyset.com</text:span></text:p>
          </table:table-cell>
          <table:table-cell table:style-name="Tableau27.A3" office:value-type="string">
            <text:p text:style-name="Standard"><text:span text:style-name="T12">technology, artificial intelligence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Canva éléments</text:span></text:p>
          </table:table-cell>
          <table:table-cell table:style-name="Tableau27.A2" office:value-type="string">
            <text:p text:style-name="Standard"><text:span text:style-name="T12">canva.com (intégré)</text:span></text:p>
          </table:table-cell>
          <table:table-cell table:style-name="Tableau27.A2" office:value-type="string">
            <text:p text:style-name="Standard"><text:span text:style-name="T12">AI brain, circuit board, robot</text:span></text:p>
          </table:table-cell>
        </table:table-row>
      </table:table>
      <text:p text:style-name="P6"/>
      <text:h text:style-name="P4" text:outline-level="2"><text:span text:style-name="T8">Mots-clés de recherche</text:span></text:h>
      <text:p text:style-name="P13"/>
      <text:p text:style-name="P15"><text:span text:style-name="T19">› <text:s/></text:span><text:span text:style-name="T16">En français : cerveau intelligence artificielle, réseau neuronal, puce électronique IA</text:span></text:p>
      <text:p text:style-name="P15"><text:span text:style-name="T19">› <text:s/></text:span><text:span text:style-name="T16">En anglais : AI brain neural network, artificial intelligence circuit, robot head tech</text:span></text:p>
      <text:p text:style-name="P15"><text:span text:style-name="T19">› <text:s/></text:span><text:span text:style-name="T16">Pour Canva : artificial intelligence, brain technology, neural network, circuit board</text:span></text:p>
      <text:p text:style-name="P6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Standard"><text:span text:style-name="T18">Conseil pro : cherche des illustrations avec fond TRANSPARENT (PNG). Ça te donnera plus de flexibilité pour les positionner sur n'importe quel fond dans Canva.</text:span></text:p>
          </table:table-cell>
        </table:table-row>
      </table:table>
      <text:p text:style-name="P6"/>
      <text:h text:style-name="P3" text:outline-level="1"><text:span text:style-name="T6"/></text:h>
      <text:h text:style-name="P3" text:outline-level="1"><text:span text:style-name="T6">8. Checklist Finale — Avant de Télécharger</text:span></text:h>
      <text:p text:style-name="P13"/>
      <text:p text:style-name="P14"><text:span text:style-name="T14">Vérifie chaque point avant de télécharger ta couverture finale.</text:span></text:p>
      <text:p text:style-name="P6"/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Standard"><text:span text:style-name="T11">✓</text:span></text:p>
          </table:table-cell>
          <table:table-cell table:style-name="Tableau29.A1" office:value-type="string">
            <text:p text:style-name="Standard"><text:span text:style-name="T11">Élément à vérifier</text:span></text:p>
          </table:table-cell>
        </table:table-row>
        <text:soft-page-break/>
        <table:table-row table:style-name="Tableau29.1">
          <table:table-cell table:style-name="Tableau29.A2" office:value-type="string">
            <text:p text:style-name="Standard"><text:span text:style-name="T12">☐</text:span></text:p>
          </table:table-cell>
          <table:table-cell table:style-name="Tableau29.A2" office:value-type="string">
            <text:p text:style-name="Standard"><text:span text:style-name="T12">Le titre 'De Zéro à Expert en IA' est bien en Bleu Marine #1A237E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2">☐</text:span></text:p>
          </table:table-cell>
          <table:table-cell table:style-name="Tableau29.A3" office:value-type="string">
            <text:p text:style-name="Standard"><text:span text:style-name="T12">'en 90 Jours' est bien en Orange #E65100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☐</text:span></text:p>
          </table:table-cell>
          <table:table-cell table:style-name="Tableau29.A2" office:value-type="string">
            <text:p text:style-name="Standard"><text:span text:style-name="T12">Le sous-titre est lisible et en italique bleu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2">☐</text:span></text:p>
          </table:table-cell>
          <table:table-cell table:style-name="Tableau29.A3" office:value-type="string">
            <text:p text:style-name="Standard"><text:span text:style-name="T12">L'illustration IA est centrée et propre (pas de fond blanc)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☐</text:span></text:p>
          </table:table-cell>
          <table:table-cell table:style-name="Tableau29.A2" office:value-type="string">
            <text:p text:style-name="Standard"><text:span text:style-name="T12">L'encadré accroche a bien la bordure orange à gauche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2">☐</text:span></text:p>
          </table:table-cell>
          <table:table-cell table:style-name="Tableau29.A3" office:value-type="string">
            <text:p text:style-name="Standard"><text:span text:style-name="T12">Le nom </text:span><text:span text:style-name="T13">MAFON Ahowanou Odilon</text:span><text:span text:style-name="T12"> est visible et bien formaté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☐</text:span></text:p>
          </table:table-cell>
          <table:table-cell table:style-name="Tableau29.A2" office:value-type="string">
            <text:p text:style-name="Standard"><text:span text:style-name="T12">Le badge prix affiche bien 15,50€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2">☐</text:span></text:p>
          </table:table-cell>
          <table:table-cell table:style-name="Tableau29.A3" office:value-type="string">
            <text:p text:style-name="Standard"><text:span text:style-name="T12">Les bandes bleu marine sont présentes en haut et en bas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☐</text:span></text:p>
          </table:table-cell>
          <table:table-cell table:style-name="Tableau29.A2" office:value-type="string">
            <text:p text:style-name="Standard"><text:span text:style-name="T12">Tous les textes sont lisibles (pas trop petits)</text:span></text:p>
          </table:table-cell>
        </table:table-row>
        <table:table-row table:style-name="Tableau29.1">
          <table:table-cell table:style-name="Tableau29.A3" office:value-type="string">
            <text:p text:style-name="Standard"><text:span text:style-name="T12">☐</text:span></text:p>
          </table:table-cell>
          <table:table-cell table:style-name="Tableau29.A3" office:value-type="string">
            <text:p text:style-name="Standard"><text:span text:style-name="T12">L'export est en PNG 300 DPI</text:span></text:p>
          </table:table-cell>
        </table:table-row>
      </table:table>
      <text:p text:style-name="P6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Standard"><text:span text:style-name="T20">Dernière étape : montre ta couverture à 2 ou 3 personnes et demande leur première impression en 5 secondes. Si elles comprennent immédiatement que c'est un livre sur l'IA, ta couverture est réussie !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12121" loext:opacity="10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12121" loext:opacity="10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1a237e" loext:opacity="100%" style:font-name="Arial1" fo:font-family="Arial" style:font-family-generic="swiss" style:font-pitch="variable" fo:font-size="17pt" fo:font-weight="bold" style:font-name-asian="Arial2" style:font-family-asian="Arial" style:font-family-generic-asian="system" style:font-pitch-asian="variable" style:font-size-asian="17pt" style:font-weight-asian="bold" style:font-name-complex="Arial2" style:font-family-complex="Arial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65cm" style:contextual-spacing="false"/>
      <style:text-properties fo:color="#1565c0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53cm" fo:margin-bottom="0.176cm" style:contextual-spacing="false"/>
      <style:text-properties fo:color="#212121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="0cm" fo:border-left="none" fo:border-right="none" fo:border-top="none" fo:border-bottom="0.11pt solid #dddddd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11pt solid #dddddd" fo:border-bottom="none"/>
    </style:style>
    <style:style style:name="MT1" style:family="text">
      <style:text-properties fo:color="#9e9e9e" loext:opacity="100%" style:font-name="Arial" fo:font-size="9pt" style:font-name-asian="Arial2" style:font-size-asian="9pt" style:font-name-complex="Arial2" style:font-size-complex="9pt"/>
    </style:style>
    <style:style style:name="MT2" style:family="text">
      <style:text-properties fo:color="#9e9e9e" loext:opacity="100%" style:font-name="Arial" fo:font-size="9pt" officeooo:rsid="00071121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293cm" fo:margin-right="2.29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rief Créatif — Couverture Ebook <text:s/>· <text:s/></text:span><text:span text:style-name="MT2">MAFON A, Odilon</text:span></text:p>
      </style:header>
      <style:footer>
        <text:p text:style-name="MP2"><text:span text:style-name="MT1">© 2026 </text:span><text:span text:style-name="MT2">MAFON A, Odilon</text:span><text:span text:style-name="MT1"> · <text:s/></text:span><text:span text:style-name="MT2">odilonmafon,com</text:span><text:span text:style-name="MT1">· <text:s/>Page 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6-12T05:49:35.638000000</meta:creation-date>
    <dc:date>2026-06-12T06:58:54.143678419</dc:date>
    <meta:editing-duration>PT8M46S</meta:editing-duration>
    <meta:document-statistic meta:table-count="30" meta:image-count="0" meta:object-count="0" meta:page-count="11" meta:paragraph-count="264" meta:word-count="1773" meta:character-count="10631" meta:non-whitespace-character-count="8971"/>
    <meta:generator>LibreOffice/24.2.7.2$Linux_X86_64 LibreOffice_project/420$Build-2</meta:generator>
  </office:meta>
</office:document-meta>
</file>