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top="0cm" fo:margin-bottom="0cm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13"/>
    <style:style style:name="P23" style:family="paragraph" style:parent-style-name="Text_20_body" style:list-style-name="L13">
      <style:paragraph-properties fo:margin-top="0cm" fo:margin-bottom="0cm" style:contextual-spacing="false"/>
    </style:style>
    <style:style style:name="P24" style:family="paragraph" style:parent-style-name="Text_20_body" style:list-style-name="L14"/>
    <style:style style:name="P25" style:family="paragraph" style:parent-style-name="Text_20_body" style:list-style-name="L14">
      <style:paragraph-properties fo:margin-top="0cm" fo:margin-bottom="0cm" style:contextual-spacing="false"/>
    </style:style>
    <style:style style:name="P26" style:family="paragraph" style:parent-style-name="Text_20_body" style:list-style-name="L15"/>
    <style:style style:name="P27" style:family="paragraph" style:parent-style-name="Text_20_body" style:list-style-name="L15">
      <style:paragraph-properties fo:margin-top="0cm" fo:margin-bottom="0cm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cm" fo:margin-bottom="0cm" style:contextual-spacing="false"/>
    </style:style>
    <style:style style:name="P30" style:family="paragraph" style:parent-style-name="Text_20_body" style:list-style-name="L17"/>
    <style:style style:name="P31" style:family="paragraph" style:parent-style-name="Text_20_body" style:list-style-name="L17">
      <style:paragraph-properties fo:margin-top="0cm" fo:margin-bottom="0cm" style:contextual-spacing="false"/>
    </style:style>
    <style:style style:name="P32" style:family="paragraph" style:parent-style-name="Text_20_body" style:list-style-name="L18"/>
    <style:style style:name="P33" style:family="paragraph" style:parent-style-name="Text_20_body" style:list-style-name="L18">
      <style:paragraph-properties fo:margin-top="0cm" fo:margin-bottom="0cm" style:contextual-spacing="false"/>
    </style:style>
    <style:style style:name="P34" style:family="paragraph" style:parent-style-name="Text_20_body" style:list-style-name="L19"/>
    <style:style style:name="P35" style:family="paragraph" style:parent-style-name="Text_20_body" style:list-style-name="L19">
      <style:paragraph-properties fo:margin-top="0cm" fo:margin-bottom="0cm" style:contextual-spacing="false"/>
    </style:style>
    <style:style style:name="P36" style:family="paragraph" style:parent-style-name="Text_20_body" style:list-style-name="L20"/>
    <style:style style:name="P37" style:family="paragraph" style:parent-style-name="Text_20_body" style:list-style-name="L20">
      <style:paragraph-properties fo:margin-top="0cm" fo:margin-bottom="0cm" style:contextual-spacing="false"/>
    </style:style>
    <style:style style:name="P38" style:family="paragraph" style:parent-style-name="Text_20_body" style:list-style-name="L21"/>
    <style:style style:name="P39" style:family="paragraph" style:parent-style-name="Text_20_body" style:list-style-name="L21">
      <style:paragraph-properties fo:margin-top="0cm" fo:margin-bottom="0cm" style:contextual-spacing="false"/>
    </style:style>
    <style:style style:name="P40" style:family="paragraph" style:parent-style-name="Text_20_body" style:list-style-name="L22"/>
    <style:style style:name="P41" style:family="paragraph" style:parent-style-name="Text_20_body" style:list-style-name="L23"/>
    <style:style style:name="P42" style:family="paragraph" style:parent-style-name="Text_20_body" style:list-style-name="L23">
      <style:paragraph-properties fo:margin-top="0cm" fo:margin-bottom="0cm" style:contextual-spacing="false"/>
    </style:style>
    <style:style style:name="P43" style:family="paragraph" style:parent-style-name="Text_20_body" style:list-style-name="L24"/>
    <style:style style:name="P44" style:family="paragraph" style:parent-style-name="Text_20_body" style:list-style-name="L24">
      <style:paragraph-properties fo:margin-top="0cm" fo:margin-bottom="0cm" style:contextual-spacing="false"/>
    </style:style>
    <style:style style:name="P45" style:family="paragraph" style:parent-style-name="Text_20_body" style:list-style-name="L25"/>
    <style:style style:name="P46" style:family="paragraph" style:parent-style-name="Text_20_body" style:list-style-name="L2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📖 PLAN COMPLET DE L'EBOOK</text:h>
      <text:h text:style-name="Heading_20_3" text:outline-level="3">"De Zéro à Expert en IA en 90 Jours"</text:h>
      <text:h text:style-name="Heading_20_4" text:outline-level="4">Le Guide Pratique pour Créer, Vendre et Déployer des Agents Intelligents en Afrique</text:h>
      <text:p text:style-name="Text_20_body"><text:span text:style-name="Emphasis">Par AIZO Jean Marie</text:span></text:p>
      <text:p text:style-name="Horizontal_20_Line"/>
      <text:h text:style-name="Heading_20_3" text:outline-level="3">🎨 PARTIE 1 — PAGES LIMINAIRES</text:h>
      <text:p text:style-name="Text_20_body"><text:span text:style-name="Strong_20_Emphasis">Page 1 — Couverture</text:span></text:p>
      <text:list text:style-name="L1">
        <text:list-item>
          <text:p text:style-name="P2">Titre principal </text:p>
        </text:list-item>
        <text:list-item>
          <text:p text:style-name="P2">Sous-titre </text:p>
        </text:list-item>
        <text:list-item>
          <text:p text:style-name="P2">Nom de l'auteur </text:p>
        </text:list-item>
        <text:list-item>
          <text:p text:style-name="P1">Visuel professionnel </text:p>
        </text:list-item>
      </text:list>
      <text:p text:style-name="Text_20_body"><text:span text:style-name="Strong_20_Emphasis">Page 2 — Page de Copyright</text:span></text:p>
      <text:list text:style-name="L2">
        <text:list-item>
          <text:p text:style-name="P4">Droits d'auteur </text:p>
        </text:list-item>
        <text:list-item>
          <text:p text:style-name="P4">Mentions légales </text:p>
        </text:list-item>
        <text:list-item>
          <text:p text:style-name="P3">Contacts </text:p>
        </text:list-item>
      </text:list>
      <text:p text:style-name="Text_20_body"><text:span text:style-name="Strong_20_Emphasis">Page 3 — Page de Dédicace</text:span></text:p>
      <text:list text:style-name="L3">
        <text:list-item>
          <text:p text:style-name="P5">Message personnel de Jean Marie </text:p>
        </text:list-item>
      </text:list>
      <text:p text:style-name="Text_20_body"><text:span text:style-name="Strong_20_Emphasis">Page 4 — Page de Remerciements</text:span></text:p>
      <text:list text:style-name="L4">
        <text:list-item>
          <text:p text:style-name="P6">Personnes qui ont contribué au parcours </text:p>
        </text:list-item>
      </text:list>
      <text:p text:style-name="Text_20_body"><text:span text:style-name="Strong_20_Emphasis">Page 5-6 — Table des Matières</text:span></text:p>
      <text:list text:style-name="L5">
        <text:list-item>
          <text:p text:style-name="P7">Navigation complète du livre </text:p>
        </text:list-item>
      </text:list>
      <text:p text:style-name="Text_20_body"><text:span text:style-name="Strong_20_Emphasis">Page 7-8 — Préface</text:span></text:p>
      <text:list text:style-name="L6">
        <text:list-item>
          <text:p text:style-name="P9">Qui est AIZO Jean Marie </text:p>
        </text:list-item>
        <text:list-item>
          <text:p text:style-name="P9">Son parcours de comptable à expert IA </text:p>
        </text:list-item>
        <text:list-item>
          <text:p text:style-name="P8">Pourquoi il a écrit ce livre </text:p>
        </text:list-item>
      </text:list>
      <text:p text:style-name="Text_20_body"><text:span text:style-name="Strong_20_Emphasis">Page 9-12 — Introduction</text:span></text:p>
      <text:list text:style-name="L7">
        <text:list-item>
          <text:p text:style-name="P11">Le problème : l'Afrique et la révolution IA </text:p>
        </text:list-item>
        <text:list-item>
          <text:p text:style-name="P11">La solution : maîtriser l'IA avant les autres </text:p>
        </text:list-item>
        <text:list-item>
          <text:p text:style-name="P11">Ce que tu vas apprendre dans ce livre </text:p>
        </text:list-item>
        <text:list-item>
          <text:p text:style-name="P11">Comment utiliser ce livre </text:p>
        </text:list-item>
        <text:list-item>
          <text:p text:style-name="P11">Les outils dont tu as besoin </text:p>
        </text:list-item>
        <text:list-item>
          <text:p text:style-name="P10">La promesse : 90 jours pour transformer ta carrière </text:p>
        </text:list-item>
      </text:list>
      <text:p text:style-name="Horizontal_20_Line"/>
      <text:h text:style-name="Heading_20_3" text:outline-level="3"><text:soft-page-break/>📚 PARTIE 2 — LE CORPS DU LIVRE (12 Chapitres)</text:h>
      <text:p text:style-name="Horizontal_20_Line"/>
      <text:h text:style-name="Heading_20_4" text:outline-level="4">🔵 MODULE 1 — FONDATIONS TECHNIQUES (Semaines 1-4)</text:h>
      <text:p text:style-name="Text_20_body"><text:span text:style-name="Strong_20_Emphasis">Chapitre 1 — Semaine 1</text:span> <text:span text:style-name="Emphasis">Python &amp; Environnement : Pose les Fondations</text:span></text:p>
      <text:list text:style-name="L8">
        <text:list-item>
          <text:p text:style-name="P13">Pourquoi Python est le langage de l'IA </text:p>
        </text:list-item>
        <text:list-item>
          <text:p text:style-name="P13">Installer et configurer ton environnement </text:p>
        </text:list-item>
        <text:list-item>
          <text:p text:style-name="P13">Les variables, types et f-strings </text:p>
        </text:list-item>
        <text:list-item>
          <text:p text:style-name="P13">Les fonctions — ton code réutilisable </text:p>
        </text:list-item>
        <text:list-item>
          <text:p text:style-name="P13">Les listes et boucles for </text:p>
        </text:list-item>
        <text:list-item>
          <text:p text:style-name="P13">Git — installe et configure </text:p>
        </text:list-item>
        <text:list-item>
          <text:p text:style-name="P13">GitHub — crée ton premier repo </text:p>
        </text:list-item>
        <text:list-item>
          <text:p text:style-name="P13">Exercice pratique </text:p>
        </text:list-item>
        <text:list-item>
          <text:p text:style-name="P12">Checklist de validation </text:p>
        </text:list-item>
      </text:list>
      <text:p text:style-name="Text_20_body"><text:span text:style-name="Strong_20_Emphasis">Chapitre 2 — Semaine 2</text:span> <text:span text:style-name="Emphasis">Structures de Données : Parle le Langage des Machines</text:span></text:p>
      <text:list text:style-name="L9">
        <text:list-item>
          <text:p text:style-name="P15">Les dictionnaires — la structure des APIs </text:p>
        </text:list-item>
        <text:list-item>
          <text:p text:style-name="P15">Parcourir un dictionnaire avec .items() </text:p>
        </text:list-item>
        <text:list-item>
          <text:p text:style-name="P15">Les classes — crée tes propres objets </text:p>
        </text:list-item>
        <text:list-item>
          <text:p text:style-name="P15"><text:span text:style-name="Strong_20_Emphasis">init</text:span>, self et les attributs expliqués </text:p>
        </text:list-item>
        <text:list-item>
          <text:p text:style-name="P15">Les fichiers CSV — stocke tes données </text:p>
        </text:list-item>
        <text:list-item>
          <text:p text:style-name="P15">Écrire et lire un fichier CSV </text:p>
        </text:list-item>
        <text:list-item>
          <text:p text:style-name="P15">Projet : Agent de profil en CSV </text:p>
        </text:list-item>
        <text:list-item>
          <text:p text:style-name="P15">Exercice pratique </text:p>
        </text:list-item>
        <text:list-item>
          <text:p text:style-name="P14">Checklist de validation </text:p>
        </text:list-item>
      </text:list>
      <text:p text:style-name="Text_20_body"><text:span text:style-name="Strong_20_Emphasis">Chapitre 3 — Semaine 3</text:span> <text:span text:style-name="Emphasis">API OpenAI : Connecte-toi à l'Intelligence Artificielle</text:span></text:p>
      <text:list text:style-name="L10">
        <text:list-item>
          <text:p text:style-name="P17">C'est quoi une API — l'analogie du restaurant </text:p>
        </text:list-item>
        <text:list-item>
          <text:p text:style-name="P17">Installer le package OpenAI </text:p>
        </text:list-item>
        <text:list-item>
          <text:p text:style-name="P17">La clé API — pourquoi et comment la sécuriser </text:p>
        </text:list-item>
        <text:list-item>
          <text:p text:style-name="P17">Les variables d'environnement </text:p>
        </text:list-item>
        <text:list-item>
          <text:p text:style-name="P17">Ton premier appel à l'API </text:p>
        </text:list-item>
        <text:list-item>
          <text:p text:style-name="P17">Les rôles : system, user, assistant </text:p>
        </text:list-item>
        <text:list-item>
          <text:p text:style-name="P17">Le prompt engineering — les règles d'or </text:p>
        </text:list-item>
        <text:list-item>
          <text:p text:style-name="P17">Prompt faible vs prompt fort </text:p>
        </text:list-item>
        <text:list-item>
          <text:p text:style-name="P17">Les tokens et les coûts </text:p>
        </text:list-item>
        <text:list-item>
          <text:p text:style-name="P17">Projet : Générateur de contenu multi-style </text:p>
        </text:list-item>
        <text:list-item>
          <text:p text:style-name="P17">Exercice pratique </text:p>
        </text:list-item>
        <text:list-item>
          <text:p text:style-name="P16">Checklist de validation </text:p>
        </text:list-item>
      </text:list>
      <text:p text:style-name="Text_20_body"><text:span text:style-name="Strong_20_Emphasis">Chapitre 4 — Semaine 4</text:span> <text:span text:style-name="Emphasis">Few-Shot &amp; Sécurité : Travaille Comme un Pro</text:span></text:p>
      <text:list text:style-name="L11">
        <text:list-item>
          <text:p text:style-name="P19">Le fichier .env — méthode professionnelle </text:p>
        </text:list-item>
        <text:list-item>
          <text:p text:style-name="P19">python-dotenv — installer et utiliser </text:p>
        </text:list-item>
        <text:list-item>
          <text:p text:style-name="P19">Le fichier .gitignore — protège tes secrets </text:p>
        </text:list-item>
        <text:list-item>
          <text:p text:style-name="P19">Zero-shot vs One-shot vs Few-shot </text:p>
        </text:list-item>
        <text:list-item>
          <text:p text:style-name="P19"><text:soft-page-break/>Structure du few-shot prompting </text:p>
        </text:list-item>
        <text:list-item>
          <text:p text:style-name="P19">Combiner few-shot + multi-style </text:p>
        </text:list-item>
        <text:list-item>
          <text:p text:style-name="P19">Sauvegarder les résultats en CSV </text:p>
        </text:list-item>
        <text:list-item>
          <text:p text:style-name="P19">Projet : Générateur amélioré avec sauvegarde </text:p>
        </text:list-item>
        <text:list-item>
          <text:p text:style-name="P19">Exercice pratique </text:p>
        </text:list-item>
        <text:list-item>
          <text:p text:style-name="P18">Checklist de validation </text:p>
        </text:list-item>
      </text:list>
      <text:p text:style-name="Horizontal_20_Line"/>
      <text:h text:style-name="Heading_20_4" text:outline-level="4">🟢 MODULE 2 — CONSTRUIRE DES AGENTS (Semaines 5-8)</text:h>
      <text:p text:style-name="Text_20_body"><text:span text:style-name="Strong_20_Emphasis">Chapitre 5 — Semaine 5</text:span> <text:span text:style-name="Emphasis">LangChain : Le Framework des Agents IA</text:span></text:p>
      <text:list text:style-name="L12">
        <text:list-item>
          <text:p text:style-name="P21">C'est quoi LangChain et pourquoi l'utiliser </text:p>
        </text:list-item>
        <text:list-item>
          <text:p text:style-name="P21">Installer LangChain </text:p>
        </text:list-item>
        <text:list-item>
          <text:p text:style-name="P21">Les chains — enchaîner des appels API </text:p>
        </text:list-item>
        <text:list-item>
          <text:p text:style-name="P21">LLMChain — ta première chain </text:p>
        </text:list-item>
        <text:list-item>
          <text:p text:style-name="P21">PromptTemplate — des prompts dynamiques </text:p>
        </text:list-item>
        <text:list-item>
          <text:p text:style-name="P21">SimpleSequentialChain — chains en série </text:p>
        </text:list-item>
        <text:list-item>
          <text:p text:style-name="P21">Projet : Pipeline de traitement de texte </text:p>
        </text:list-item>
        <text:list-item>
          <text:p text:style-name="P21">Exercice pratique </text:p>
        </text:list-item>
        <text:list-item>
          <text:p text:style-name="P20">Checklist de validation </text:p>
        </text:list-item>
      </text:list>
      <text:p text:style-name="Text_20_body"><text:span text:style-name="Strong_20_Emphasis">Chapitre 6 — Semaine 6</text:span> <text:span text:style-name="Emphasis">Mémoire : Crée un Assistant qui se Souvient</text:span></text:p>
      <text:list text:style-name="L13">
        <text:list-item>
          <text:p text:style-name="P23">Pourquoi la mémoire est cruciale pour un agent </text:p>
        </text:list-item>
        <text:list-item>
          <text:p text:style-name="P23">ConversationBufferMemory </text:p>
        </text:list-item>
        <text:list-item>
          <text:p text:style-name="P23">ConversationSummaryMemory </text:p>
        </text:list-item>
        <text:list-item>
          <text:p text:style-name="P23">Construire un assistant avec historique </text:p>
        </text:list-item>
        <text:list-item>
          <text:p text:style-name="P23">Persister la mémoire dans un fichier </text:p>
        </text:list-item>
        <text:list-item>
          <text:p text:style-name="P23">Projet : Assistant spécialisé avec mémoire persistante </text:p>
        </text:list-item>
        <text:list-item>
          <text:p text:style-name="P23">Exercice pratique </text:p>
        </text:list-item>
        <text:list-item>
          <text:p text:style-name="P22">Checklist de validation </text:p>
        </text:list-item>
      </text:list>
      <text:p text:style-name="Text_20_body"><text:span text:style-name="Strong_20_Emphasis">Chapitre 7 — Semaine 7</text:span> <text:span text:style-name="Emphasis">Embeddings &amp; ChromaDB : Donne une Mémoire Longue à Ton Agent</text:span></text:p>
      <text:list text:style-name="L14">
        <text:list-item>
          <text:p text:style-name="P25">C'est quoi un embedding — l'analogie du GPS </text:p>
        </text:list-item>
        <text:list-item>
          <text:p text:style-name="P25">Les bases vectorielles — comment ça fonctionne </text:p>
        </text:list-item>
        <text:list-item>
          <text:p text:style-name="P25">Installer ChromaDB </text:p>
        </text:list-item>
        <text:list-item>
          <text:p text:style-name="P25">Créer et interroger une base vectorielle </text:p>
        </text:list-item>
        <text:list-item>
          <text:p text:style-name="P25">Les modèles d'embeddings multilingues </text:p>
        </text:list-item>
        <text:list-item>
          <text:p text:style-name="P25">Pipeline RAG — Retrieval Augmented Generation </text:p>
        </text:list-item>
        <text:list-item>
          <text:p text:style-name="P25">Projet : Chatbot sur ses propres documents </text:p>
        </text:list-item>
        <text:list-item>
          <text:p text:style-name="P25">Exercice pratique </text:p>
        </text:list-item>
        <text:list-item>
          <text:p text:style-name="P24">Checklist de validation </text:p>
        </text:list-item>
      </text:list>
      <text:p text:style-name="Text_20_body"><text:span text:style-name="Strong_20_Emphasis">Chapitre 8 — Semaine 8</text:span> <text:span text:style-name="Emphasis">RAG Avancé : Ton Agent Lit Tes Documents</text:span></text:p>
      <text:list text:style-name="L15">
        <text:list-item>
          <text:p text:style-name="P27">Charger des fichiers PDF dans ChromaDB </text:p>
        </text:list-item>
        <text:list-item>
          <text:p text:style-name="P27">Découper les documents en chunks </text:p>
        </text:list-item>
        <text:list-item>
          <text:p text:style-name="P27">Recherche sémantique avancée </text:p>
        </text:list-item>
        <text:list-item>
          <text:p text:style-name="P27"><text:soft-page-break/>Combiner RAG + mémoire conversationnelle </text:p>
        </text:list-item>
        <text:list-item>
          <text:p text:style-name="P27">Optimiser la qualité des réponses </text:p>
        </text:list-item>
        <text:list-item>
          <text:p text:style-name="P27">Projet : Chatbot RAG sur ses propres PDF </text:p>
        </text:list-item>
        <text:list-item>
          <text:p text:style-name="P27">Exercice pratique </text:p>
        </text:list-item>
        <text:list-item>
          <text:p text:style-name="P26">Checklist de validation </text:p>
        </text:list-item>
      </text:list>
      <text:p text:style-name="Horizontal_20_Line"/>
      <text:h text:style-name="Heading_20_4" text:outline-level="4">🟠 MODULE 3 — AGENTS AUTONOMES (Semaines 9-10)</text:h>
      <text:p text:style-name="Text_20_body"><text:span text:style-name="Strong_20_Emphasis">Chapitre 9 — Semaine 9</text:span> <text:span text:style-name="Emphasis">Agents avec Outils : Donne des Super-Pouvoirs à Ton IA</text:span></text:p>
      <text:list text:style-name="L16">
        <text:list-item>
          <text:p text:style-name="P29">C'est quoi un agent autonome </text:p>
        </text:list-item>
        <text:list-item>
          <text:p text:style-name="P29">Les outils — ce que peut faire un agent </text:p>
        </text:list-item>
        <text:list-item>
          <text:p text:style-name="P29">Créer des outils personnalisés </text:p>
        </text:list-item>
        <text:list-item>
          <text:p text:style-name="P29">L'agent ReAct — raisonne et agit </text:p>
        </text:list-item>
        <text:list-item>
          <text:p text:style-name="P29">Connecter un agent à la recherche web </text:p>
        </text:list-item>
        <text:list-item>
          <text:p text:style-name="P29">Gérer les erreurs d'un agent </text:p>
        </text:list-item>
        <text:list-item>
          <text:p text:style-name="P29">Projet : Agent de recherche automatique </text:p>
        </text:list-item>
        <text:list-item>
          <text:p text:style-name="P29">Exercice pratique </text:p>
        </text:list-item>
        <text:list-item>
          <text:p text:style-name="P28">Checklist de validation </text:p>
        </text:list-item>
      </text:list>
      <text:p text:style-name="Text_20_body"><text:span text:style-name="Strong_20_Emphasis">Chapitre 10 — Semaine 10</text:span> <text:span text:style-name="Emphasis">CrewAI : Fais Travailler Plusieurs Agents Ensemble</text:span></text:p>
      <text:list text:style-name="L17">
        <text:list-item>
          <text:p text:style-name="P31">C'est quoi CrewAI </text:p>
        </text:list-item>
        <text:list-item>
          <text:p text:style-name="P31">Créer une équipe d'agents </text:p>
        </text:list-item>
        <text:list-item>
          <text:p text:style-name="P31">Définir les rôles et les tâches </text:p>
        </text:list-item>
        <text:list-item>
          <text:p text:style-name="P31">La communication entre agents </text:p>
        </text:list-item>
        <text:list-item>
          <text:p text:style-name="P31">Projet : Agent de veille sectorielle IA </text:p>
        </text:list-item>
        <text:list-item>
          <text:p text:style-name="P31">Exercice pratique </text:p>
        </text:list-item>
        <text:list-item>
          <text:p text:style-name="P30">Checklist de validation </text:p>
        </text:list-item>
      </text:list>
      <text:p text:style-name="Horizontal_20_Line"/>
      <text:h text:style-name="Heading_20_4" text:outline-level="4">🔴 MODULE 4 — DÉPLOIEMENT &amp; BUSINESS (Semaines 11-12)</text:h>
      <text:p text:style-name="Text_20_body"><text:span text:style-name="Strong_20_Emphasis">Chapitre 11 — Semaine 11</text:span> <text:span text:style-name="Emphasis">Streamlit : Crée une Interface pour Ton Agent</text:span></text:p>
      <text:list text:style-name="L18">
        <text:list-item>
          <text:p text:style-name="P33">C'est quoi Streamlit </text:p>
        </text:list-item>
        <text:list-item>
          <text:p text:style-name="P33">Installer et configurer Streamlit </text:p>
        </text:list-item>
        <text:list-item>
          <text:p text:style-name="P33">Les composants essentiels </text:p>
        </text:list-item>
        <text:list-item>
          <text:p text:style-name="P33">Construire une interface de chatbot </text:p>
        </text:list-item>
        <text:list-item>
          <text:p text:style-name="P33">Connecter ton agent à l'interface </text:p>
        </text:list-item>
        <text:list-item>
          <text:p text:style-name="P33">Tester et améliorer l'UX </text:p>
        </text:list-item>
        <text:list-item>
          <text:p text:style-name="P33">Projet : Interface complète pour ton agent </text:p>
        </text:list-item>
        <text:list-item>
          <text:p text:style-name="P33">Exercice pratique </text:p>
        </text:list-item>
        <text:list-item>
          <text:p text:style-name="P32">Checklist de validation </text:p>
        </text:list-item>
      </text:list>
      <text:p text:style-name="Text_20_body"><text:span text:style-name="Strong_20_Emphasis">Chapitre 12 — Semaine 12</text:span> <text:span text:style-name="Emphasis">Docker &amp; Déploiement : Mets Ton Agent en Ligne</text:span></text:p>
      <text:list text:style-name="L19">
        <text:list-item>
          <text:p text:style-name="P35">C'est quoi Docker — l'analogie du container </text:p>
        </text:list-item>
        <text:list-item>
          <text:p text:style-name="P35">Créer un Dockerfile </text:p>
        </text:list-item>
        <text:list-item>
          <text:p text:style-name="P35"><text:soft-page-break/>Builder et tester ton container </text:p>
        </text:list-item>
        <text:list-item>
          <text:p text:style-name="P35">Déployer sur Render — étape par étape </text:p>
        </text:list-item>
        <text:list-item>
          <text:p text:style-name="P35">Obtenir une URL publique partageable </text:p>
        </text:list-item>
        <text:list-item>
          <text:p text:style-name="P35">Monitorer et maintenir ton agent </text:p>
        </text:list-item>
        <text:list-item>
          <text:p text:style-name="P35">Projet : Agent complet déployé en ligne </text:p>
        </text:list-item>
        <text:list-item>
          <text:p text:style-name="P35">Partager sur LinkedIn </text:p>
        </text:list-item>
        <text:list-item>
          <text:p text:style-name="P35">Exercice pratique </text:p>
        </text:list-item>
        <text:list-item>
          <text:p text:style-name="P34">Checklist de validation </text:p>
        </text:list-item>
      </text:list>
      <text:p text:style-name="Horizontal_20_Line"/>
      <text:h text:style-name="Heading_20_3" text:outline-level="3">🎯 PARTIE 3 — PAGES FINALES</text:h>
      <text:p text:style-name="Text_20_body"><text:span text:style-name="Strong_20_Emphasis">Conclusion</text:span></text:p>
      <text:list text:style-name="L20">
        <text:list-item>
          <text:p text:style-name="P37">Le chemin parcouru en 90 jours </text:p>
        </text:list-item>
        <text:list-item>
          <text:p text:style-name="P37">Tu n'es plus le même qu'au début </text:p>
        </text:list-item>
        <text:list-item>
          <text:p text:style-name="P37">La prochaine étape : vendre tes agents </text:p>
        </text:list-item>
        <text:list-item>
          <text:p text:style-name="P36">Message final motivant de Jean Marie </text:p>
        </text:list-item>
      </text:list>
      <text:p text:style-name="Text_20_body"><text:span text:style-name="Strong_20_Emphasis">Annexe A — Ressources Recommandées</text:span></text:p>
      <text:list text:style-name="L21">
        <text:list-item>
          <text:p text:style-name="P39">Sites web et documentations </text:p>
        </text:list-item>
        <text:list-item>
          <text:p text:style-name="P39">Cours en ligne gratuits </text:p>
        </text:list-item>
        <text:list-item>
          <text:p text:style-name="P39">Communautés et forums </text:p>
        </text:list-item>
        <text:list-item>
          <text:p text:style-name="P38">Outils indispensables </text:p>
        </text:list-item>
      </text:list>
      <text:p text:style-name="Text_20_body"><text:span text:style-name="Strong_20_Emphasis">Annexe B — Glossaire</text:span></text:p>
      <text:list text:style-name="L22">
        <text:list-item>
          <text:p text:style-name="P40">30 termes clés de l'IA expliqués simplement </text:p>
        </text:list-item>
      </text:list>
      <text:p text:style-name="Text_20_body"><text:span text:style-name="Strong_20_Emphasis">Annexe C — Récapitulatif des Commandes</text:span></text:p>
      <text:list text:style-name="L23">
        <text:list-item>
          <text:p text:style-name="P42">Toutes les commandes Linux </text:p>
        </text:list-item>
        <text:list-item>
          <text:p text:style-name="P42">Toutes les commandes Git </text:p>
        </text:list-item>
        <text:list-item>
          <text:p text:style-name="P41">Les packages Python essentiels </text:p>
        </text:list-item>
      </text:list>
      <text:p text:style-name="Text_20_body"><text:span text:style-name="Strong_20_Emphasis">À Propos de l'Auteur</text:span></text:p>
      <text:list text:style-name="L24">
        <text:list-item>
          <text:p text:style-name="P44">Biographie de AIZO Jean Marie </text:p>
        </text:list-item>
        <text:list-item>
          <text:p text:style-name="P44">Sa vision pour l'Afrique et l'IA </text:p>
        </text:list-item>
        <text:list-item>
          <text:p text:style-name="P43">Comment le contacter </text:p>
        </text:list-item>
      </text:list>
      <text:p text:style-name="Text_20_body"><text:span text:style-name="Strong_20_Emphasis">Dos du Livre</text:span></text:p>
      <text:list text:style-name="L25">
        <text:list-item>
          <text:p text:style-name="P46">Résumé accrocheur en 5 lignes </text:p>
        </text:list-item>
        <text:list-item>
          <text:p text:style-name="P46">3 promesses clés du livre </text:p>
        </text:list-item>
        <text:list-item>
          <text:p text:style-name="P46">Photo et bio courte de l'auteur </text:p>
        </text:list-item>
        <text:list-item>
          <text:p text:style-name="P45">Prix et contact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1T07:21:17.699568515</meta:creation-date>
    <dc:date>2026-06-11T07:22:18.340862816</dc:date>
    <meta:editing-duration>PT1M1S</meta:editing-duration>
    <meta:editing-cycles>1</meta:editing-cycles>
    <meta:document-statistic meta:table-count="0" meta:image-count="0" meta:object-count="0" meta:page-count="5" meta:paragraph-count="183" meta:word-count="1100" meta:character-count="6344" meta:non-whitespace-character-count="5376"/>
    <meta:generator>LibreOffice/24.2.7.2$Linux_X86_64 LibreOffice_project/420$Build-2</meta:generator>
  </office:meta>
</office:document-meta>
</file>